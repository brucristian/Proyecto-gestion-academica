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0.9972in"/>
    </style:style>
    <style:style style:family="table-column" style:name="co3">
      <style:table-column-properties fo:break-before="auto" style:column-width="1.4154in"/>
    </style:style>
    <style:style style:family="table-column" style:name="co4">
      <style:table-column-properties fo:break-before="auto" style:column-width="3.0984in"/>
    </style:style>
    <style:style style:family="table-column" style:name="co5">
      <style:table-column-properties fo:break-before="auto" style:column-width="1.4043in"/>
    </style:style>
    <style:style style:family="table-column" style:name="co6">
      <style:table-column-properties fo:break-before="auto" style:column-width="1.5118in"/>
    </style:style>
    <style:style style:family="table-column" style:name="co7">
      <style:table-column-properties fo:break-before="auto" style:column-width="1.372in"/>
    </style:style>
    <style:style style:family="table-column" style:name="co8">
      <style:table-column-properties fo:break-before="auto" style:column-width="1.0508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3" style:parent-style-name="Default">
      <style:table-cell-properties style:repeat-content="false" style:text-align-source="fix"/>
      <style:paragraph-properties fo:margin-left="0in"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ADMIN" office:value-type="string">
            <text:p>ADMIN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TEACHER" office:value-type="string">
            <text:p>TEACHER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STUDENT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Prerequisite" table:style-name="ta1"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11" office:value-type="string">
            <text:p>11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14" office:value-type="string">
            <text:p>14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17" office:value-type="string">
            <text:p>17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17" office:value-type="string">
            <text:p>17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20" office:value-type="string">
            <text:p>20</text:p>
          </table:table-cell>
        </table:table-row>
      </table:table>
      <table:table table:name="Course" table:style-name="ta1">
        <table:table-column table:default-cell-style-name="ce3" table:style-name="co1"/>
        <table:table-column table:default-cell-style-name="ce3" table:style-name="co4"/>
        <table:table-column table:default-cell-style-name="ce3" table:number-columns-repeated="2" table:style-name="co1"/>
        <table:table-column table:default-cell-style-name="Default" table:style-name="co5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ELECTRONICA" office:value-type="string">
            <text:p>ELECTRONICA</text:p>
          </table:table-cell>
          <table:table-cell calcext:value-type="string" office:string-value="CFP2206" office:value-type="string">
            <text:p>CFP220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FISICA DE ONDAS" office:value-type="string">
            <text:p>FISICA DE ONDAS</text:p>
          </table:table-cell>
          <table:table-cell calcext:value-type="string" office:string-value="CFBD229" office:value-type="string">
            <text:p>CFBD229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BASE DE DATOS" office:value-type="string">
            <text:p>BASE DE DATOS</text:p>
          </table:table-cell>
          <table:table-cell calcext:value-type="string" office:string-value="CFP2207" office:value-type="string">
            <text:p>CFP2207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ESTRUCTURA DE DATOS" office:value-type="string">
            <text:p>ESTRUCTURA DE DATOS</text:p>
          </table:table-cell>
          <table:table-cell calcext:value-type="string" office:string-value="CFP2208" office:value-type="string">
            <text:p>CFP2208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ADMINISTRACION" office:value-type="string">
            <text:p>ADMINISTRACION</text:p>
          </table:table-cell>
          <table:table-cell calcext:value-type="string" office:string-value="CFP2209" office:value-type="string">
            <text:p>CFP220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INGLES IV" office:value-type="string">
            <text:p>INGLES IV</text:p>
          </table:table-cell>
          <table:table-cell calcext:value-type="string" office:string-value="FN24036" office:value-type="string">
            <text:p>FN2403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FISICA MECANICA" office:value-type="string">
            <text:p>FISICA MECANICA</text:p>
          </table:table-cell>
          <table:table-cell calcext:value-type="string" office:string-value="CFBD223" office:value-type="string">
            <text:p>CFBD223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PROGRAMACION BASICA" office:value-type="string">
            <text:p>PROGRAMACION BASICA</text:p>
          </table:table-cell>
          <table:table-cell calcext:value-type="string" office:string-value="CFP2203" office:value-type="string">
            <text:p>CFP220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PRODUCCION Y COMPRENSION TEXTUAL II" office:value-type="string">
            <text:p>PRODUCCION Y COMPRENSION TEXTUAL II</text:p>
          </table:table-cell>
          <table:table-cell calcext:value-type="string" office:string-value="FN23004" office:value-type="string">
            <text:p>FN2300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INGLES II" office:value-type="string">
            <text:p>INGLES II</text:p>
          </table:table-cell>
          <table:table-cell calcext:value-type="string" office:string-value="FN23005" office:value-type="string">
            <text:p>FN2300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CALCULO VECTORIAL" office:value-type="string">
            <text:p>CALCULO VECTORIAL</text:p>
          </table:table-cell>
          <table:table-cell calcext:value-type="string" office:string-value="CFBD224" office:value-type="string">
            <text:p>CFBD22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CFBD225" office:value-type="string">
            <text:p>CFBD22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ELECTROMACNETISMO Y LABORATORIO" office:value-type="string">
            <text:p>ELECTROMACNETISMO Y LABORATORIO</text:p>
          </table:table-cell>
          <table:table-cell calcext:value-type="string" office:string-value="CFBD226" office:value-type="string">
            <text:p>CFBD22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PROGRAMACION ORIENTADA A OBJETOS" office:value-type="string">
            <text:p>PROGRAMACION ORIENTADA A OBJETOS</text:p>
          </table:table-cell>
          <table:table-cell calcext:value-type="string" office:string-value="CFP2204" office:value-type="string">
            <text:p>CFP220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TEORIA GENERAL DE SISTEMAS" office:value-type="string">
            <text:p>TEORIA GENERAL DE SISTEMAS</text:p>
          </table:table-cell>
          <table:table-cell calcext:value-type="string" office:string-value="CFP2205" office:value-type="string">
            <text:p>CFP220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PROBABILIDAD Y ESTADISTICA" office:value-type="string">
            <text:p>PROBABILIDAD Y ESTADISTICA</text:p>
          </table:table-cell>
          <table:table-cell calcext:value-type="string" office:string-value="CFBD227" office:value-type="string">
            <text:p>CFBD22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CALCULO DIFERENCIAL" office:value-type="string">
            <text:p>CALCULO DIFERENCIAL</text:p>
          </table:table-cell>
          <table:table-cell calcext:value-type="string" office:string-value="CFBD002" office:value-type="string">
            <text:p>CFBD00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FUNDAMENTOS DE MATEMATICAS" office:value-type="string">
            <text:p>FUNDAMENTOS DE MATEMATICAS</text:p>
          </table:table-cell>
          <table:table-cell calcext:value-type="string" office:string-value="CFBD001" office:value-type="string">
            <text:p>CFBD0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INTRODUCCION A LA INGENIERIA DE SISTEMAS" office:value-type="string">
            <text:p>INTRODUCCION A LA INGENIERIA DE SISTEMAS</text:p>
          </table:table-cell>
          <table:table-cell calcext:value-type="string" office:string-value="CFP2201" office:value-type="string">
            <text:p>CFP2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ALGORITMOS Y PROGRAMACION" office:value-type="string">
            <text:p>ALGORITMOS Y PROGRAMACION</text:p>
          </table:table-cell>
          <table:table-cell calcext:value-type="string" office:string-value="CFP2202" office:value-type="string">
            <text:p>CFP220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PRODUCCION Y COMPRENSION TEXTUAL I" office:value-type="string">
            <text:p>PRODUCCION Y COMPRENSION TEXTUAL I</text:p>
          </table:table-cell>
          <table:table-cell calcext:value-type="string" office:string-value="FN23001" office:value-type="string">
            <text:p>FN230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CATEDRA INSTITUCIONAL" office:value-type="string">
            <text:p>CATEDRA INSTITUCIONAL</text:p>
          </table:table-cell>
          <table:table-cell calcext:value-type="string" office:string-value="FN23002" office:value-type="string">
            <text:p>FN230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INGLES I" office:value-type="string">
            <text:p>INGLES I</text:p>
          </table:table-cell>
          <table:table-cell calcext:value-type="string" office:string-value="FN23003" office:value-type="string">
            <text:p>FN2300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CALCULO INTEGRAL" office:value-type="string">
            <text:p>CALCULO INTEGRAL</text:p>
          </table:table-cell>
          <table:table-cell calcext:value-type="string" office:string-value="CFBD221" office:value-type="string">
            <text:p>CFBD22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ALGEBRA LINEAL" office:value-type="string">
            <text:p>ALGEBRA LINEAL</text:p>
          </table:table-cell>
          <table:table-cell calcext:value-type="string" office:string-value="CFBD222" office:value-type="string">
            <text:p>CFBD22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INGLES III" office:value-type="string">
            <text:p>INGLES III</text:p>
          </table:table-cell>
          <table:table-cell calcext:value-type="string" office:string-value="FN24035" office:value-type="string">
            <text:p>FN2403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ECUACIONES DIFEENCIALES" office:value-type="string">
            <text:p>ECUACIONES DIFEENCIALES</text:p>
          </table:table-cell>
          <table:table-cell calcext:value-type="string" office:string-value="CFBD228" office:value-type="string">
            <text:p>CFBD228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</table:table>
      <table:table table:name="Teachers" table:style-name="ta1">
        <table:table-column table:default-cell-style-name="ce3" table:style-name="co1"/>
        <table:table-column table:default-cell-style-name="ce3" table:style-name="co6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Valentina Hernández" office:value-type="string">
            <text:p>Valentina Hernández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Daniel Torres" office:value-type="string">
            <text:p>Daniel Torres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Camila Ramírez" office:value-type="string">
            <text:p>Camila Ramírez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Sebastián Castro" office:value-type="string">
            <text:p>Sebastián Castro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Isabella Vargas" office:value-type="string">
            <text:p>Isabella Varga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Carlos Gomez" office:value-type="string">
            <text:p>Carlos Gomez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 Rodriguez" office:value-type="string">
            <text:p>Ana Rodriguez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uis Martinez" office:value-type="string">
            <text:p>Luis Martinez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Sandra Perez" office:value-type="string">
            <text:p>Sandra Perez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Diego Herrera" office:value-type="string">
            <text:p>Diego Herrera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Juan Pérez" office:value-type="string">
            <text:p>Juan Pérez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María González" office:value-type="string">
            <text:p>María González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Carlos Rodríguez" office:value-type="string">
            <text:p>Carlos Rodríguez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Sofía Martínez" office:value-type="string">
            <text:p>Sofía Martínez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Andrés López" office:value-type="string">
            <text:p>Andrés López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Cristian" office:value-type="string">
            <text:p>Cristian</text:p>
          </table:table-cell>
          <table:table-cell calcext:value-type="string" office:string-value="Bru" office:value-type="string">
            <text:p>Bru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895032" office:value-type="string">
            <text:p>4895032</text:p>
          </table:table-cell>
          <table:table-cell calcext:value-type="string" office:string-value="2002-06-08" office:value-type="string">
            <text:p>2002-06-08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1029384773" office:value-type="string">
            <text:p>1029384773</text:p>
          </table:table-cell>
          <table:table-cell calcext:value-type="string" office:string-value="Cartagena" office:value-type="string">
            <text:p>Cartagena</text:p>
          </table:table-cell>
          <table:table-cell calcext:value-type="string" office:string-value="cristian@gmail.com" office:value-type="string">
            <text:p>cristian@gmail.com</text:p>
          </table:table-cell>
          <table:table-cell calcext:value-type="string" office:string-value="$2a$10$y/P3wMFfkeKImVzPBYXD7e17tHiMbR/3qBZnYHpYlkeHjSUJktS1S" office:value-type="string">
            <text:p>$2a$10$y/P3wMFfkeKImVzPBYXD7e17tHiMbR/3qBZnYHpYlkeHjSUJktS1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7T02:51:16.135801353" office:value-type="string">
            <text:p>2026-06-27T02:51:16.135801353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Sebas" office:value-type="string">
            <text:p>Sebas</text:p>
          </table:table-cell>
          <table:table-cell calcext:value-type="string" office:string-value="Escobar" office:value-type="string">
            <text:p>Escobar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74826846" office:value-type="string">
            <text:p>374826846</text:p>
          </table:table-cell>
          <table:table-cell calcext:value-type="string" office:string-value="2006-06-08" office:value-type="string">
            <text:p>2006-06-08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012839048" office:value-type="string">
            <text:p>012839048</text:p>
          </table:table-cell>
          <table:table-cell calcext:value-type="string" office:string-value="Cartagena" office:value-type="string">
            <text:p>Cartagena</text:p>
          </table:table-cell>
          <table:table-cell calcext:value-type="string" office:string-value="sebas@gmail.com" office:value-type="string">
            <text:p>sebas@gmail.com</text:p>
          </table:table-cell>
          <table:table-cell calcext:value-type="string" office:string-value="$2a$10$dT9ywQfWro14rLi.B/H.XeNvj.SDbB6mh9wPLKGk7LCR8TOWzuBJq" office:value-type="string">
            <text:p>$2a$10$dT9ywQfWro14rLi.B/H.XeNvj.SDbB6mh9wPLKGk7LCR8TOWzuBJq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7T02:54:45.813897770" office:value-type="string">
            <text:p>2026-06-27T02:54:45.81389777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3" office:value-type="string">
            <text:p>4627423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@gmail.com" office:value-type="string">
            <text:p>pepe@gmail.com</text:p>
          </table:table-cell>
          <table:table-cell calcext:value-type="string" office:string-value="$2a$10$kmI.mrpNUsRzR/cNwRohceklkkK18XfPVKWl0rSqYOiw2yUQm/nMK" office:value-type="string">
            <text:p>$2a$10$kmI.mrpNUsRzR/cNwRohceklkkK18XfPVKWl0rSqYOiw2yUQm/nMK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7:27.838447007" office:value-type="string">
            <text:p>2026-06-12T22:47:27.838447007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23" office:value-type="string">
            <text:p>46274232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2@gmail.com" office:value-type="string">
            <text:p>pepe2@gmail.com</text:p>
          </table:table-cell>
          <table:table-cell calcext:value-type="string" office:string-value="$2a$10$Zx5Sg5l30XVzFNpQS.0p9.JqNaXgJL8SIGwAPp0rzEhhQxZmz7YaS" office:value-type="string">
            <text:p>$2a$10$Zx5Sg5l30XVzFNpQS.0p9.JqNaXgJL8SIGwAPp0rzEhhQxZmz7Ya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8:02.189395849" office:value-type="string">
            <text:p>2026-06-12T22:48:02.18939584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Camilo" office:value-type="string">
            <text:p>Camilo</text:p>
          </table:table-cell>
          <table:table-cell calcext:value-type="string" office:string-value="Sierra" office:value-type="string">
            <text:p>Sier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4577" office:value-type="string">
            <text:p>324577</text:p>
          </table:table-cell>
          <table:table-cell calcext:value-type="string" office:string-value="2006-06-15" office:value-type="string">
            <text:p>2006-06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683456" office:value-type="string">
            <text:p>7683456</text:p>
          </table:table-cell>
          <table:table-cell calcext:value-type="string" office:string-value="Colombia" office:value-type="string">
            <text:p>Colombia</text:p>
          </table:table-cell>
          <table:table-cell calcext:value-type="string" office:string-value="camilo@gmail.com" office:value-type="string">
            <text:p>camilo@gmail.com</text:p>
          </table:table-cell>
          <table:table-cell calcext:value-type="string" office:string-value="$2a$10$HytWvQlEIYxRUAY.HvFnOOw7Ft1z3sVQbjYiL058PTLvWlgXwVDRi" office:value-type="string">
            <text:p>$2a$10$HytWvQlEIYxRUAY.HvFnOOw7Ft1z3sVQbjYiL058PTLvWlgXwVDRi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3:05:21.531249294" office:value-type="string">
            <text:p>2026-06-12T23:05:21.531249294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427639947" office:value-type="string">
            <text:p>1427639947</text:p>
          </table:table-cell>
          <table:table-cell calcext:value-type="string" office:string-value="2000-05-15" office:value-type="string">
            <text:p>2000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dmin@gmail.com" office:value-type="string">
            <text:p>admin@gmail.com</text:p>
          </table:table-cell>
          <table:table-cell calcext:value-type="string" office:string-value="$2a$10$daeShadbfMYNQaJ9Lw3ZAuWb9492Lv29ZE5f5cgX0svG3Rm25nMxm" office:value-type="string">
            <text:p>$2a$10$daeShadbfMYNQaJ9Lw3ZAuWb9492Lv29ZE5f5cgX0svG3Rm25nMx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2026-06-19T14:49:52.472652532" office:value-type="string">
            <text:p>2026-06-19T14:49:52.472652532</text:p>
          </table:table-cell>
        </table:table-row>
        <table:table-row>
          <table:table-cell calcext:value-type="string" office:string-value="USR3" office:value-type="string">
            <text:p>USR3</text:p>
          </table:table-cell>
          <table:table-cell calcext:value-type="string" office:string-value="Joan Sebastian" office:value-type="string">
            <text:p>Joan Sebastian</text:p>
          </table:table-cell>
          <table:table-cell calcext:value-type="string" office:string-value="Vergara Valencia" office:value-type="string">
            <text:p>Vergara Valenci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34338" office:value-type="string">
            <text:p>3234338</text:p>
          </table:table-cell>
          <table:table-cell calcext:value-type="string" office:string-value="2005-05-15" office:value-type="string">
            <text:p>2005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oansebastian@gmail.com" office:value-type="string">
            <text:p>joansebastian@gmail.com</text:p>
          </table:table-cell>
          <table:table-cell calcext:value-type="string" office:string-value="$2a$10$LagSmVSGn/UUPBwzIXnSiuElc/U6yribdu5sWzP5qJ2duyzAFI.ou" office:value-type="string">
            <text:p>$2a$10$LagSmVSGn/UUPBwzIXnSiuElc/U6yribdu5sWzP5qJ2duyzAFI.ou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13:19:32.045600729" office:value-type="string">
            <text:p>2026-06-12T13:19:32.045600729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mando" office:value-type="string">
            <text:p>Armando</text:p>
          </table:table-cell>
          <table:table-cell calcext:value-type="string" office:string-value="Escobar" office:value-type="string">
            <text:p>Escobar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75335" office:value-type="string">
            <text:p>4675335</text:p>
          </table:table-cell>
          <table:table-cell calcext:value-type="string" office:string-value="2003-06-16" office:value-type="string">
            <text:p>2003-06-16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26383929" office:value-type="string">
            <text:p>726383929</text:p>
          </table:table-cell>
          <table:table-cell calcext:value-type="string" office:string-value="sjndkzdx" office:value-type="string">
            <text:p>sjndkzdx</text:p>
          </table:table-cell>
          <table:table-cell calcext:value-type="string" office:string-value="armando@gmail.com" office:value-type="string">
            <text:p>armando@gmail.com</text:p>
          </table:table-cell>
          <table:table-cell calcext:value-type="string" office:string-value="$2a$10$2rW9glTwiM10G6alXFzfQeHgKQihbQw0I7NQpqbKeVdQ47Jbcl2A." office:value-type="string">
            <text:p>$2a$10$2rW9glTwiM10G6alXFzfQeHgKQihbQw0I7NQpqbKeVdQ47Jbcl2A.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6T15:23:41.095057129" office:value-type="string">
            <text:p>2026-06-26T15:23:41.095057129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ejemplo" office:value-type="string">
            <text:p>ejemplo</text:p>
          </table:table-cell>
          <table:table-cell calcext:value-type="string" office:string-value="eee" office:value-type="string">
            <text:p>eee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0298973" office:value-type="string">
            <text:p>0298973</text:p>
          </table:table-cell>
          <table:table-cell calcext:value-type="string" office:string-value="2026-06-02" office:value-type="string">
            <text:p>2026-06-02</text:p>
          </table:table-cell>
          <table:table-cell calcext:value-type="string" office:string-value="FEMALE" office:value-type="string">
            <text:p>FEMALE</text:p>
          </table:table-cell>
          <table:table-cell calcext:value-type="string" office:string-value="333333333" office:value-type="string">
            <text:p>333333333</text:p>
          </table:table-cell>
          <table:table-cell calcext:value-type="string" office:string-value="ddddddd" office:value-type="string">
            <text:p>ddddddd</text:p>
          </table:table-cell>
          <table:table-cell calcext:value-type="string" office:string-value="kkkk@gmail.com" office:value-type="string">
            <text:p>kkkk@gmail.com</text:p>
          </table:table-cell>
          <table:table-cell calcext:value-type="string" office:string-value="$2a$10$y8BLy7SJbRBjaEtnHLvpWONQ3ZzC5zhBPg43uZv.gCcaLDxCr8Ee2" office:value-type="string">
            <text:p>$2a$10$y8BLy7SJbRBjaEtnHLvpWONQ3ZzC5zhBPg43uZv.gCcaLDxCr8Ee2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6T15:25:24.356535393" office:value-type="string">
            <text:p>2026-06-26T15:25:24.356535393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Pepita" office:value-type="string">
            <text:p>Pepita</text:p>
          </table:table-cell>
          <table:table-cell calcext:value-type="string" office:string-value="Perez" office:value-type="string">
            <text:p>Pe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987654321" office:value-type="string">
            <text:p>987654321</text:p>
          </table:table-cell>
          <table:table-cell calcext:value-type="string" office:string-value="2002-04-14" office:value-type="string">
            <text:p>2002-04-14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9837492983" office:value-type="string">
            <text:p>9837492983</text:p>
          </table:table-cell>
          <table:table-cell calcext:value-type="string" office:string-value="Magdalena" office:value-type="string">
            <text:p>Magdalena</text:p>
          </table:table-cell>
          <table:table-cell calcext:value-type="string" office:string-value="pepita@gmail.com" office:value-type="string">
            <text:p>pepita@gmail.com</text:p>
          </table:table-cell>
          <table:table-cell calcext:value-type="string" office:string-value="$2a$10$7GHcdva0wiTLp0Aq3W80COOH/CYzbJiPVu3kFRLu58Vx207r9zTqS" office:value-type="string">
            <text:p>$2a$10$7GHcdva0wiTLp0Aq3W80COOH/CYzbJiPVu3kFRLu58Vx207r9zTq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6T21:37:40.176504395" office:value-type="string">
            <text:p>2026-06-26T21:37:40.176504395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column table:default-cell-style-name="Default" table:style-name="co7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academicProgram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78069123" office:value-type="string">
            <text:p>78069123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3787465" office:value-type="string">
            <text:p>6378746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5" office:value-type="string">
            <text:p>STU5</text:p>
          </table:table-cell>
          <table:table-cell calcext:value-type="string" office:string-value="86438676" office:value-type="string">
            <text:p>86438676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STU4" office:value-type="string">
            <text:p>STU4</text:p>
          </table:table-cell>
          <table:table-cell calcext:value-type="string" office:string-value="41868525" office:value-type="string">
            <text:p>4186852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7982716" office:value-type="string">
            <text:p>2798271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3" office:value-type="string">
            <text:p>STU3</text:p>
          </table:table-cell>
          <table:table-cell calcext:value-type="string" office:string-value="78900205" office:value-type="string">
            <text:p>78900205</text:p>
          </table:table-cell>
          <table:table-cell calcext:value-type="string" office:string-value="USR3" office:value-type="string">
            <text:p>USR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8669145" office:value-type="string">
            <text:p>68669145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53946793" office:value-type="string">
            <text:p>53946793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97728066" office:value-type="string">
            <text:p>9772806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1" office:value-type="string">
            <text:p>1</text:p>
          </table:table-cell>
        </table:table-row>
      </table:table>
      <table:table table:name="Enrollments" table:style-name="ta1">
        <table:table-column table:default-cell-style-name="Default" table:number-columns-repeated="3" table:style-name="co1"/>
        <table:table-column table:default-cell-style-name="Default" table:style-name="co8"/>
        <table:table-column table:default-cell-style-name="Default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  <table:table-cell calcext:value-type="string" office:value-type="string">
            <text:p>academicPeriod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7" office:value-type="string">
            <text:p>2026-06-27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27" office:value-type="string">
            <text:p>2026-06-27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>
          <table:table-cell calcext:value-type="string" office:string-value="ED12" office:value-type="string">
            <text:p>ED1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3" office:value-type="string">
            <text:p>ED1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4" office:value-type="string">
            <text:p>ED1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" office:value-type="string">
            <text:p>ED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4.5" office:value-type="string">
            <text:p>4.5</text:p>
          </table:table-cell>
        </table:table-row>
        <table:table-row>
          <table:table-cell calcext:value-type="string" office:string-value="ED1" office:value-type="string">
            <text:p>ED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3.1" office:value-type="string">
            <text:p>3.1</text:p>
          </table:table-cell>
        </table:table-row>
        <table:table-row>
          <table:table-cell calcext:value-type="string" office:string-value="ED4" office:value-type="string">
            <text:p>ED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3.7" office:value-type="string">
            <text:p>3.7</text:p>
          </table:table-cell>
        </table:table-row>
        <table:table-row>
          <table:table-cell calcext:value-type="string" office:string-value="ED3" office:value-type="string">
            <text:p>ED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4.9" office:value-type="string">
            <text:p>4.9</text:p>
          </table:table-cell>
        </table:table-row>
        <table:table-row>
          <table:table-cell calcext:value-type="string" office:string-value="ED6" office:value-type="string">
            <text:p>ED6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4.2" office:value-type="string">
            <text:p>4.2</text:p>
          </table:table-cell>
        </table:table-row>
        <table:table-row>
          <table:table-cell calcext:value-type="string" office:string-value="ED5" office:value-type="string">
            <text:p>ED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4.5" office:value-type="string">
            <text:p>4.5</text:p>
          </table:table-cell>
        </table:table-row>
        <table:table-row>
          <table:table-cell calcext:value-type="string" office:string-value="ED8" office:value-type="string">
            <text:p>ED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7" office:value-type="string">
            <text:p>ED7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3.6" office:value-type="string">
            <text:p>3.6</text:p>
          </table:table-cell>
        </table:table-row>
        <table:table-row>
          <table:table-cell calcext:value-type="string" office:string-value="ED9" office:value-type="string">
            <text:p>ED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0" office:value-type="string">
            <text:p>ED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1" office:value-type="string">
            <text:p>ED1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</table:table>
      <table:table table:name="AcademicHistory" table:style-name="ta1">
        <table:table-column table:default-cell-style-name="Default" table:number-columns-repeated="2" table:style-name="co1"/>
        <table:table-column table:default-cell-style-name="Default" table:style-name="co3"/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academicHistory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enrollmentDetailId</text:p>
          </table:table-cell>
          <table:table-cell calcext:value-type="string" office:value-type="string">
            <text:p>grad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5" office:value-type="string">
            <text:p>5</text:p>
          </table:table-cell>
          <table:table-cell calcext:value-type="string" office:value="0.0" office:value-type="float">
            <text:p>0.0</text:p>
          </table:table-cell>
          <table:table-cell calcext:value-type="string" office:string-value="IN_PROGRESS" office:value-type="string">
            <text:p>IN_PROGRESS</text:p>
          </table:table-cell>
        </table:table-row>
      </table:table>
      <table:table table:name="AcademicPeriod" table:style-name="ta1">
        <table:table-column table:default-cell-style-name="Default" table:number-columns-repeated="6" table:style-name="co1"/>
        <table:table-row table:style-name="ro1">
          <table:table-cell calcext:value-type="string" office:value-type="string">
            <text:p>academicPeriodId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startDate</text:p>
          </table:table-cell>
          <table:table-cell calcext:value-type="string" office:value-type="string">
            <text:p>endDat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026-2" office:value-type="string">
            <text:p>2026-2</text:p>
          </table:table-cell>
          <table:table-cell calcext:value-type="string" office:string-value="Segundo Periodo Academico del 2026" office:value-type="string">
            <text:p>Segundo Periodo Academico del 2026</text:p>
          </table:table-cell>
          <table:table-cell calcext:value-type="string" office:string-value="2026-08-03" office:value-type="string">
            <text:p>2026-08-03</text:p>
          </table:table-cell>
          <table:table-cell calcext:value-type="string" office:string-value="2026-12-16" office:value-type="string">
            <text:p>2026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027-1" office:value-type="string">
            <text:p>2027-1</text:p>
          </table:table-cell>
          <table:table-cell calcext:value-type="string" office:string-value="Periodo academico para 2027-1" office:value-type="string">
            <text:p>Periodo academico para 2027-1</text:p>
          </table:table-cell>
          <table:table-cell calcext:value-type="string" office:string-value="2027-02-14" office:value-type="string">
            <text:p>2027-02-14</text:p>
          </table:table-cell>
          <table:table-cell calcext:value-type="string" office:string-value="2027-06-17" office:value-type="string">
            <text:p>2027-06-17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027-2" office:value-type="string">
            <text:p>2027-2</text:p>
          </table:table-cell>
          <table:table-cell calcext:value-type="string" office:string-value="Periodo academico del 2027-2" office:value-type="string">
            <text:p>Periodo academico del 2027-2</text:p>
          </table:table-cell>
          <table:table-cell calcext:value-type="string" office:string-value="2027-08-06" office:value-type="string">
            <text:p>2027-08-06</text:p>
          </table:table-cell>
          <table:table-cell calcext:value-type="string" office:string-value="2027-12-16" office:value-type="string">
            <text:p>2027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028-1" office:value-type="string">
            <text:p>2028-1</text:p>
          </table:table-cell>
          <table:table-cell calcext:value-type="string" office:string-value="Periodo academico para 2028-1" office:value-type="string">
            <text:p>Periodo academico para 2028-1</text:p>
          </table:table-cell>
          <table:table-cell calcext:value-type="string" office:string-value="2028-02-14" office:value-type="string">
            <text:p>2028-02-14</text:p>
          </table:table-cell>
          <table:table-cell calcext:value-type="string" office:string-value="2028-06-16" office:value-type="string">
            <text:p>2028-06-16</text:p>
          </table:table-cell>
          <table:table-cell calcext:value-type="string" office:string-value="ACTIVE" office:value-type="string">
            <text:p>ACTIVE</text:p>
          </table:table-cell>
        </table:table-row>
      </table:table>
      <table:table table:name="AcademicProgram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Ingenieria de Sistemas" office:value-type="string">
            <text:p>Ingenieria de Sistemas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Ingenieria de Software" office:value-type="string">
            <text:p>Ingenieria de Software</text:p>
          </table:table-cell>
          <table:table-cell calcext:value-type="string" office:string-value="10" office:value-type="string">
            <text:p>10</text:p>
          </table:table-cell>
        </table:table-row>
      </table:table>
      <table:table table:name="Group" table:style-name="ta1">
        <table:table-column table:default-cell-style-name="ce3" table:number-columns-repeated="5" table:style-name="co1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</table:table-row>
        <table:table-row>
          <table:table-cell calcext:value-type="string" office:string-value="GRP27" office:value-type="string">
            <text:p>GRP27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G1" office:value-type="string">
            <text:p>G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25" office:value-type="string">
            <text:p>GRP25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1" office:value-type="string">
            <text:p>C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26" office:value-type="string">
            <text:p>GRP26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1" office:value-type="string">
            <text:p>C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23" office:value-type="string">
            <text:p>GRP23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C1" office:value-type="string">
            <text:p>C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24" office:value-type="string">
            <text:p>GRP24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C1" office:value-type="string">
            <text:p>C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21" office:value-type="string">
            <text:p>GRP2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A3" office:value-type="string">
            <text:p>A3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22" office:value-type="string">
            <text:p>GRP2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1" office:value-type="string">
            <text:p>C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20" office:value-type="string">
            <text:p>GRP2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F1" office:value-type="string">
            <text:p>F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18" office:value-type="string">
            <text:p>GRP18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19" office:value-type="string">
            <text:p>GRP19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16" office:value-type="string">
            <text:p>GRP16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17" office:value-type="string">
            <text:p>GRP1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14" office:value-type="string">
            <text:p>GRP14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15" office:value-type="string">
            <text:p>GRP15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A1" office:value-type="string">
            <text:p>A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12" office:value-type="string">
            <text:p>GRP12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13" office:value-type="string">
            <text:p>GRP13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10" office:value-type="string">
            <text:p>GRP10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A4" office:value-type="string">
            <text:p>A4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GRP11" office:value-type="string">
            <text:p>GRP11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B1" office:value-type="string">
            <text:p>B1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GRP8" office:value-type="string">
            <text:p>GRP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H1" office:value-type="string">
            <text:p>H1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GRP9" office:value-type="string">
            <text:p>GRP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D101" office:value-type="string">
            <text:p>D101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D1" office:value-type="string">
            <text:p>D1</text:p>
          </table:table-cell>
          <table:table-cell calcext:value-type="string" office:string-value="26" office:value-type="string">
            <text:p>26</text:p>
          </table:table-cell>
        </table:table-row>
      </table:table>
      <table:table table:name="GroupSchedule" table:style-name="ta1">
        <table:table-column table:default-cell-style-name="ce3" table:number-columns-repeated="6" table:style-name="co1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>
            <text:p>startTime</text:p>
          </table:table-cell>
          <table:table-cell calcext:value-type="string" office:value-type="string">
            <text:p>endTime</text:p>
          </table:table-cell>
          <table:table-cell calcext:value-type="string" office:value-type="string">
            <text:p>classroom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GRP15" office:value-type="string">
            <text:p>GRP15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09:15:00 PM" office:value-type="string">
            <text:p>09:15:00 PM</text:p>
          </table:table-cell>
          <table:table-cell calcext:value-type="string" office:string-value="A203" office:value-type="string">
            <text:p>A203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GRP15" office:value-type="string">
            <text:p>GRP15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G202" office:value-type="string">
            <text:p>G202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GRP16" office:value-type="string">
            <text:p>GRP16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09:15:00 PM" office:value-type="string">
            <text:p>09:15:00 PM</text:p>
          </table:table-cell>
          <table:table-cell calcext:value-type="string" office:string-value="B104" office:value-type="string">
            <text:p>B104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GRP17" office:value-type="string">
            <text:p>GRP1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F205" office:value-type="string">
            <text:p>F205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GRP17" office:value-type="string">
            <text:p>GRP1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F205" office:value-type="string">
            <text:p>F205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GRP18" office:value-type="string">
            <text:p>GRP1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A205" office:value-type="string">
            <text:p>A205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GRP19" office:value-type="string">
            <text:p>GRP19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205" office:value-type="string">
            <text:p>F205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GRP20" office:value-type="string">
            <text:p>GRP20</text:p>
          </table:table-cell>
          <table:table-cell calcext:value-type="string" office:string-value="SABADO" office:value-type="string">
            <text:p>SABADO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20:00 AM" office:value-type="string">
            <text:p>10:20:00 AM</text:p>
          </table:table-cell>
          <table:table-cell calcext:value-type="string" office:string-value="B205" office:value-type="string">
            <text:p>B205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GRP21" office:value-type="string">
            <text:p>GRP2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G204" office:value-type="string">
            <text:p>G204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GRP21" office:value-type="string">
            <text:p>GRP21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45:00 PM" office:value-type="string">
            <text:p>07:45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C104" office:value-type="string">
            <text:p>C104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GRP8" office:value-type="string">
            <text:p>GRP8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A204" office:value-type="string">
            <text:p>A204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GRP22" office:value-type="string">
            <text:p>GRP2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45:00 PM" office:value-type="string">
            <text:p>07:45:00 PM</text:p>
          </table:table-cell>
          <table:table-cell calcext:value-type="string" office:string-value="G205" office:value-type="string">
            <text:p>G205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GRP8" office:value-type="string">
            <text:p>GRP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C104" office:value-type="string">
            <text:p>C104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GRP22" office:value-type="string">
            <text:p>GRP2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G205" office:value-type="string">
            <text:p>G205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GRP9" office:value-type="string">
            <text:p>GRP9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A204" office:value-type="string">
            <text:p>A204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GRP23" office:value-type="string">
            <text:p>GRP23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F205" office:value-type="string">
            <text:p>F205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GRP9" office:value-type="string">
            <text:p>GRP9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A301" office:value-type="string">
            <text:p>A301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GRP23" office:value-type="string">
            <text:p>GRP23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F205" office:value-type="string">
            <text:p>F205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GRP10" office:value-type="string">
            <text:p>GRP10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A204" office:value-type="string">
            <text:p>A204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GRP24" office:value-type="string">
            <text:p>GRP24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F202" office:value-type="string">
            <text:p>F202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GRP10" office:value-type="string">
            <text:p>GRP1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G203" office:value-type="string">
            <text:p>G203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GRP24" office:value-type="string">
            <text:p>GRP24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45:00 PM" office:value-type="string">
            <text:p>07:45:00 PM</text:p>
          </table:table-cell>
          <table:table-cell calcext:value-type="string" office:string-value="09:15:00 PM" office:value-type="string">
            <text:p>09:15:00 PM</text:p>
          </table:table-cell>
          <table:table-cell calcext:value-type="string" office:string-value="F202" office:value-type="string">
            <text:p>F202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GRP11" office:value-type="string">
            <text:p>GRP11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A204" office:value-type="string">
            <text:p>A204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GRP25" office:value-type="string">
            <text:p>GRP25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C102" office:value-type="string">
            <text:p>C102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GRP12" office:value-type="string">
            <text:p>GRP12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F202" office:value-type="string">
            <text:p>F202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GRP25" office:value-type="string">
            <text:p>GRP25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C203" office:value-type="string">
            <text:p>C203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GRP12" office:value-type="string">
            <text:p>GRP1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202" office:value-type="string">
            <text:p>F202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GRP13" office:value-type="string">
            <text:p>GRP13</text:p>
          </table:table-cell>
          <table:table-cell calcext:value-type="string" office:string-value="SABADO" office:value-type="string">
            <text:p>SABADO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20:00 AM" office:value-type="string">
            <text:p>10:20:00 AM</text:p>
          </table:table-cell>
          <table:table-cell calcext:value-type="string" office:string-value="B304" office:value-type="string">
            <text:p>B304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10:00 PM" office:value-type="string">
            <text:p>05:10:00 PM</text:p>
          </table:table-cell>
          <table:table-cell calcext:value-type="string" office:string-value="07:45:00 PM" office:value-type="string">
            <text:p>07:45:00 PM</text:p>
          </table:table-cell>
          <table:table-cell calcext:value-type="string" office:string-value="A205" office:value-type="string">
            <text:p>A205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B103" office:value-type="string">
            <text:p>B10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B101" office:value-type="string">
            <text:p>B101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45:00 PM" office:value-type="string">
            <text:p>07:45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A205" office:value-type="string">
            <text:p>A205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F215" office:value-type="string">
            <text:p>F215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F2012" office:value-type="string">
            <text:p>F201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F2012" office:value-type="string">
            <text:p>F2012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09:15:00 PM" office:value-type="string">
            <text:p>09:15:00 PM</text:p>
          </table:table-cell>
          <table:table-cell calcext:value-type="string" office:string-value="B103" office:value-type="string">
            <text:p>B103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A205" office:value-type="string">
            <text:p>A205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GRP26" office:value-type="string">
            <text:p>GRP26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45:00 PM" office:value-type="string">
            <text:p>07:45:00 PM</text:p>
          </table:table-cell>
          <table:table-cell calcext:value-type="string" office:string-value="A205" office:value-type="string">
            <text:p>A205</text:p>
          </table:table-cell>
        </table:table-row>
        <table:table-row>
          <table:table-cell calcext:value-type="string" office:string-value="41" office:value-type="string">
            <text:p>41</text:p>
          </table:table-cell>
          <table:table-cell calcext:value-type="string" office:string-value="GRP27" office:value-type="string">
            <text:p>GRP27</text:p>
          </table:table-cell>
          <table:table-cell calcext:value-type="string" office:string-value="SABADO" office:value-type="string">
            <text:p>SABADO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20:00 AM" office:value-type="string">
            <text:p>10:20:00 AM</text:p>
          </table:table-cell>
          <table:table-cell calcext:value-type="string" office:string-value="A105" office:value-type="string">
            <text:p>A105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GRP14" office:value-type="string">
            <text:p>GRP1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30:00 PM" office:value-type="string">
            <text:p>05:30:00 PM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A203" office:value-type="string">
            <text:p>A203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GRP14" office:value-type="string">
            <text:p>GRP14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30:00 PM" office:value-type="string">
            <text:p>08:3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C105" office:value-type="string">
            <text:p>C105</text:p>
          </table:table-cell>
        </table:table-row>
      </table:table>
      <table:table table:name="SemesterTemplate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</table:table-row>
      </table:table>
      <table:table table:name="SemesterTemplateDetails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family="'Liberation Serif'" fo:font-size="12pt" fo:language="en" loext:opacity="0%" style:country-asian="CN" style:country-complex="IN" style:font-family-asian="'DejaVu Sans'" style:font-family-complex="'Noto Sans'" style:font-family-generic="roman" style:font-family-generic-asian="system" style:font-family-generic-complex="system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03:06:47.7659777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27T03:08:04.444641399</dc:date>
    <meta:editing-duration>P1DT10H41M41S</meta:editing-duration>
    <meta:editing-cycles>62</meta:editing-cycles>
    <meta:document-statistic meta:table-count="16" meta:cell-count="1033" meta:object-count="0"/>
  </office:meta>
</office:document-meta>
</file>