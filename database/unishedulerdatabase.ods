
<file path=META-INF/manifest.xml><?xml version="1.0" encoding="utf-8"?>
<manifest:manifest xmlns:loext="urn:org:documentfoundation:names:experimental:office:xmlns:loext:1.0" xmlns:manifest="urn:oasis:names:tc:opendocument:xmlns:manifest:1.0" manifest:version="1.3">
  <manifest:file-entry manifest:full-path="/" manifest:media-type="application/vnd.oasis.opendocument.spreadsheet" manifest:version="1.3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automatic-styles>
    <style:style style:family="table-column" style:name="co1">
      <style:table-column-properties fo:break-before="auto" style:column-width="0.889in"/>
    </style:style>
    <style:style style:family="table-column" style:name="co2">
      <style:table-column-properties fo:break-before="auto" style:column-width="1.4043in"/>
    </style:style>
    <style:style style:family="table-column" style:name="co3">
      <style:table-column-properties fo:break-before="auto" style:column-width="1.5547in"/>
    </style:style>
    <style:style style:family="table-column" style:name="co4">
      <style:table-column-properties fo:break-before="auto" style:column-width="1.1256in"/>
    </style:style>
    <style:style style:family="table-column" style:name="co5">
      <style:table-column-properties fo:break-before="auto" style:column-width="0.9972in"/>
    </style:style>
    <style:style style:family="table-column" style:name="co6">
      <style:table-column-properties fo:break-before="auto" style:column-width="1.4154in"/>
    </style:style>
    <style:style style:family="table-column" style:name="co7">
      <style:table-column-properties fo:break-before="auto" style:column-width="3.0984in"/>
    </style:style>
    <style:style style:family="table-column" style:name="co8">
      <style:table-column-properties fo:break-before="auto" style:column-width="1.1575in"/>
    </style:style>
    <style:style style:family="table-column" style:name="co9">
      <style:table-column-properties fo:break-before="auto" style:column-width="1.1689in"/>
    </style:style>
    <style:style style:family="table-column" style:name="co10">
      <style:table-column-properties fo:break-before="auto" style:column-width="1.1362in"/>
    </style:style>
    <style:style style:family="table-column" style:name="co11">
      <style:table-column-properties fo:break-before="auto" style:column-width="1.5118in"/>
    </style:style>
    <style:style style:family="table-column" style:name="co12">
      <style:table-column-properties fo:break-before="auto" style:column-width="1.372in"/>
    </style:style>
    <style:style style:family="table-column" style:name="co13">
      <style:table-column-properties fo:break-before="auto" style:column-width="1.0508in"/>
    </style:style>
    <style:style style:family="table-row" style:name="ro1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2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3" style:parent-style-name="Default">
      <style:table-cell-properties style:repeat-content="false" style:text-align-source="fix"/>
      <style:paragraph-properties fo:margin-left="0in"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idRole</text:p>
          </table:table-cell>
          <table:table-cell calcext:value-type="string" office:value-type="string">
            <text:p>name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ADMIN" office:value-type="string">
            <text:p>ADMIN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TEACHER" office:value-type="string">
            <text:p>TEACHER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STUDENT" office:value-type="string">
            <text:p>STUDENT</text:p>
          </table:table-cell>
        </table:table-row>
      </table:table>
      <table:table table:name="UserRole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idUserRol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role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</table:table>
      <table:table table:name="AcademicProgram" table:style-name="ta1"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row table:style-name="ro1">
          <table:table-cell calcext:value-type="string" office:value-type="string">
            <text:p>academicProgram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totalSemester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Ingenieria de Sistemas" office:value-type="string">
            <text:p>Ingenieria de Sistemas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Ingenieria de Software" office:value-type="string">
            <text:p>Ingenieria de Software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Ingenieria Civil" office:value-type="string">
            <text:p>Ingenieria Civil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Ingenieria de Alimentos" office:value-type="string">
            <text:p>Ingenieria de Alimentos</text:p>
          </table:table-cell>
          <table:table-cell calcext:value-type="string" office:string-value="10" office:value-type="string">
            <text:p>10</text:p>
          </table:table-cell>
        </table:table-row>
      </table:table>
      <table:table table:name="SemesterTemplate" table:style-name="ta1">
        <table:table-column table:default-cell-style-name="ce3" table:number-columns-repeated="3" table:style-name="co1"/>
        <table:table-row table:style-name="ro1">
          <table:table-cell calcext:value-type="string" office:value-type="string">
            <text:p>templateId</text:p>
          </table:table-cell>
          <table:table-cell calcext:value-type="string" office:value-type="string">
            <text:p>programId</text:p>
          </table:table-cell>
          <table:table-cell calcext:value-type="string" office:value-type="string">
            <text:p>semester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</table:table-row>
      </table:table>
      <table:table table:name="SemesterTemplateDetails" table:style-name="ta1">
        <table:table-column table:default-cell-style-name="ce3" table:number-columns-repeated="3" table:style-name="co1"/>
        <table:table-row table:style-name="ro1">
          <table:table-cell calcext:value-type="string" office:value-type="string">
            <text:p>detailId</text:p>
          </table:table-cell>
          <table:table-cell calcext:value-type="string" office:value-type="string">
            <text:p>templateId</text:p>
          </table:table-cell>
          <table:table-cell calcext:value-type="string" office:value-type="string">
            <text:p>groupId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2" office:value-type="string">
            <text:p>22</text:p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4" office:value-type="string">
            <text:p>24</text:p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5" office:value-type="string">
            <text:p>25</text:p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6" office:value-type="string">
            <text:p>26</text:p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7" office:value-type="string">
            <text:p>27</text:p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8" office:value-type="string">
            <text:p>28</text:p>
          </table:table-cell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9" office:value-type="string">
            <text:p>29</text:p>
          </table:table-cell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1" office:value-type="string">
            <text:p>31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2" office:value-type="string">
            <text:p>32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1" office:value-type="string">
            <text:p>11</text:p>
          </table:table-cell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3" office:value-type="string">
            <text:p>33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2" office:value-type="string">
            <text:p>12</text:p>
          </table:table-cell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4" office:value-type="string">
            <text:p>34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3" office:value-type="string">
            <text:p>13</text:p>
          </table:table-cell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5" office:value-type="string">
            <text:p>35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4" office:value-type="string">
            <text:p>14</text:p>
          </table:table-cell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6" office:value-type="string">
            <text:p>36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5" office:value-type="string">
            <text:p>15</text:p>
          </table:table-cell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7" office:value-type="string">
            <text:p>37</text:p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6" office:value-type="string">
            <text:p>16</text:p>
          </table:table-cell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8" office:value-type="string">
            <text:p>38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7" office:value-type="string">
            <text:p>17</text:p>
          </table:table-cell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9" office:value-type="string">
            <text:p>39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8" office:value-type="string">
            <text:p>18</text:p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9" office:value-type="string">
            <text:p>19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5" office:value-type="string">
            <text:p>5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7" office:value-type="string">
            <text:p>7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8" office:value-type="string">
            <text:p>8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9" office:value-type="string">
            <text:p>9</text:p>
          </table:table-cell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40" office:value-type="string">
            <text:p>40</text:p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20" office:value-type="string">
            <text:p>20</text:p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1" office:value-type="string">
            <text:p>21</text:p>
          </table:table-cell>
        </table:table-row>
      </table:table>
      <table:table table:name="Prerequisite" table:style-name="ta1">
        <table:table-column table:default-cell-style-name="ce3" table:style-name="co1"/>
        <table:table-column table:default-cell-style-name="ce3" table:style-name="co5"/>
        <table:table-column table:default-cell-style-name="ce3" table:style-name="co6"/>
        <table:table-row table:style-name="ro1">
          <table:table-cell calcext:value-type="string" office:value-type="string">
            <text:p>prerequisite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prerequisiteCourseId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21" office:value-type="string">
            <text:p>21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13" office:value-type="string">
            <text:p>13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12" office:value-type="string">
            <text:p>12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8" office:value-type="string">
            <text:p>8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16" office:value-type="string">
            <text:p>16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8" office:value-type="string">
            <text:p>8</text:p>
          </table:table-cell>
        </table:table-row>
      </table:table>
      <table:table table:name="Course" table:style-name="ta1">
        <table:table-column table:default-cell-style-name="ce3" table:style-name="co1"/>
        <table:table-column table:default-cell-style-name="ce3" table:style-name="co7"/>
        <table:table-column table:default-cell-style-name="ce3" table:number-columns-repeated="2" table:style-name="co1"/>
        <table:table-column table:default-cell-style-name="Default" table:style-name="co2"/>
        <table:table-row table:style-name="ro1">
          <table:table-cell calcext:value-type="string" office:value-type="string">
            <text:p>course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credits</text:p>
          </table:table-cell>
          <table:table-cell calcext:value-type="string" office:value-type="string">
            <text:p>description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FISICA II" office:value-type="string">
            <text:p>FISICA II</text:p>
          </table:table-cell>
          <table:table-cell calcext:value-type="string" office:string-value="FSC601" office:value-type="string">
            <text:p>FSC6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ALGEBRA LINEAL" office:value-type="string">
            <text:p>ALGEBRA LINEAL</text:p>
          </table:table-cell>
          <table:table-cell calcext:value-type="string" office:string-value="ALG302" office:value-type="string">
            <text:p>ALG30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CALCULO II" office:value-type="string">
            <text:p>CALCULO II</text:p>
          </table:table-cell>
          <table:table-cell calcext:value-type="string" office:string-value="CAL301" office:value-type="string">
            <text:p>CAL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Electiva I" office:value-type="string">
            <text:p>Electiva I</text:p>
          </table:table-cell>
          <table:table-cell calcext:value-type="string" office:string-value="ELC001" office:value-type="string">
            <text:p>ELC0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Subject001" office:value-type="string">
            <text:p>Subject001</text:p>
          </table:table-cell>
          <table:table-cell calcext:value-type="string" office:string-value="1234-ff" office:value-type="string">
            <text:p>1234-ff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METODOLOGIAS DEL DESARROLLO" office:value-type="string">
            <text:p>METODOLOGIAS DEL DESARROLLO</text:p>
          </table:table-cell>
          <table:table-cell calcext:value-type="string" office:string-value="MET201" office:value-type="string">
            <text:p>MET2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ESTRUCTURA DE DATOS" office:value-type="string">
            <text:p>ESTRUCTURA DE DATOS</text:p>
          </table:table-cell>
          <table:table-cell calcext:value-type="string" office:string-value="EDA301" office:value-type="string">
            <text:p>EDA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BASES DE DATOS I" office:value-type="string">
            <text:p>BASES DE DATOS I</text:p>
          </table:table-cell>
          <table:table-cell calcext:value-type="string" office:string-value="BDD301" office:value-type="string">
            <text:p>BDD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INGENIERIA DE REQUISITOS" office:value-type="string">
            <text:p>INGENIERIA DE REQUISITOS</text:p>
          </table:table-cell>
          <table:table-cell calcext:value-type="string" office:string-value="REQ301" office:value-type="string">
            <text:p>REQ3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INGLES II" office:value-type="string">
            <text:p>INGLES II</text:p>
          </table:table-cell>
          <table:table-cell calcext:value-type="string" office:string-value="ENG301" office:value-type="string">
            <text:p>ENG3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ESTADISTICA" office:value-type="string">
            <text:p>ESTADISTICA</text:p>
          </table:table-cell>
          <table:table-cell calcext:value-type="string" office:string-value="EST301" office:value-type="string">
            <text:p>EST3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INGENIERIA DE SOFTWARE I" office:value-type="string">
            <text:p>INGENIERIA DE SOFTWARE I</text:p>
          </table:table-cell>
          <table:table-cell calcext:value-type="string" office:string-value="ISW401" office:value-type="string">
            <text:p>ISW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BASES DE DATOS II" office:value-type="string">
            <text:p>BASES DE DATOS II</text:p>
          </table:table-cell>
          <table:table-cell calcext:value-type="string" office:string-value="BDD401" office:value-type="string">
            <text:p>BDD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SISTEMAS OPERATIVOS" office:value-type="string">
            <text:p>SISTEMAS OPERATIVOS</text:p>
          </table:table-cell>
          <table:table-cell calcext:value-type="string" office:string-value="SO401" office:value-type="string">
            <text:p>SO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DISEÑO DE SOFTWARE" office:value-type="string">
            <text:p>DISEÑO DE SOFTWARE</text:p>
          </table:table-cell>
          <table:table-cell calcext:value-type="string" office:string-value="DSW401" office:value-type="string">
            <text:p>DSW4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FUNDAMENTOS DE PROGRAMACION" office:value-type="string">
            <text:p>FUNDAMENTOS DE PROGRAMACION</text:p>
          </table:table-cell>
          <table:table-cell calcext:value-type="string" office:string-value="FPR101" office:value-type="string">
            <text:p>FPR1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MATEMATICAS BASICAS" office:value-type="string">
            <text:p>MATEMATICAS BASICAS</text:p>
          </table:table-cell>
          <table:table-cell calcext:value-type="string" office:string-value="MAT101" office:value-type="string">
            <text:p>MAT1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LOGICA COMPUTACIONAL" office:value-type="string">
            <text:p>LOGICA COMPUTACIONAL</text:p>
          </table:table-cell>
          <table:table-cell calcext:value-type="string" office:string-value="LOG204" office:value-type="string">
            <text:p>LOG20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COMPETENCIAS COMUNICATIVAS" office:value-type="string">
            <text:p>COMPETENCIAS COMUNICATIVAS</text:p>
          </table:table-cell>
          <table:table-cell calcext:value-type="string" office:string-value="COM102" office:value-type="string">
            <text:p>COM10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INTRODUCCION A LA INGENIERIA" office:value-type="string">
            <text:p>INTRODUCCION A LA INGENIERIA</text:p>
          </table:table-cell>
          <table:table-cell calcext:value-type="string" office:string-value="ING202" office:value-type="string">
            <text:p>ING20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PROGRAMACION ORIENTADA A OBJETOS" office:value-type="string">
            <text:p>PROGRAMACION ORIENTADA A OBJETOS</text:p>
          </table:table-cell>
          <table:table-cell calcext:value-type="string" office:string-value="POO201" office:value-type="string">
            <text:p>POO2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CALCULO I" office:value-type="string">
            <text:p>CALCULO I</text:p>
          </table:table-cell>
          <table:table-cell calcext:value-type="string" office:string-value="CAL201" office:value-type="string">
            <text:p>CAL2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ARQUITCTURA DE COMPUTADORES" office:value-type="string">
            <text:p>ARQUITCTURA DE COMPUTADORES</text:p>
          </table:table-cell>
          <table:table-cell calcext:value-type="string" office:string-value="ARG201" office:value-type="string">
            <text:p>ARG2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INGLES I" office:value-type="string">
            <text:p>INGLES I</text:p>
          </table:table-cell>
          <table:table-cell calcext:value-type="string" office:string-value="ENG201" office:value-type="string">
            <text:p>ENG2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REDES DE COMPUTADORES" office:value-type="string">
            <text:p>REDES DE COMPUTADORES</text:p>
          </table:table-cell>
          <table:table-cell calcext:value-type="string" office:string-value="RED401" office:value-type="string">
            <text:p>RED4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FISICA I" office:value-type="string">
            <text:p>FISICA I</text:p>
          </table:table-cell>
          <table:table-cell calcext:value-type="string" office:string-value="FSC501" office:value-type="string">
            <text:p>FSC5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</table:table>
      <table:table table:name="Group" table:style-name="ta1">
        <table:table-column table:default-cell-style-name="ce3" table:number-columns-repeated="5" table:style-name="co1"/>
        <table:table-column table:default-cell-style-name="Default" table:style-name="co8"/>
        <table:table-row table:style-name="ro1">
          <table:table-cell calcext:value-type="string" office:value-type="string">
            <text:p>group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teacherId</text:p>
          </table:table-cell>
          <table:table-cell calcext:value-type="string" office:value-type="string">
            <text:p>groupCode</text:p>
          </table:table-cell>
          <table:table-cell calcext:value-type="string" office:value-type="string">
            <text:p>capacity</text:p>
          </table:table-cell>
          <table:table-cell/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MAT101-B" office:value-type="string">
            <text:p>MAT101-B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LOG204-E" office:value-type="string">
            <text:p>LOG204-E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COM102-A" office:value-type="string">
            <text:p>COM102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ING202-H" office:value-type="string">
            <text:p>ING202-H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POO201-B" office:value-type="string">
            <text:p>POO201-B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CAL201-A" office:value-type="string">
            <text:p>CAL201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ALG302-A" office:value-type="string">
            <text:p>ALG302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FSC501-B" office:value-type="string">
            <text:p>FSC5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G201-C" office:value-type="string">
            <text:p>ENG2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DA301-EF" office:value-type="string">
            <text:p>EDA301-E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MET201-F" office:value-type="string">
            <text:p>MET201-F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CAL301-R" office:value-type="string">
            <text:p>CAL301-R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EDA301-F" office:value-type="string">
            <text:p>EDA301-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BDD301-O" office:value-type="string">
            <text:p>BDD301-O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BDD301-G" office:value-type="string">
            <text:p>BDD301-G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FSC601-GF" office:value-type="string">
            <text:p>FSC601-G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13" office:value-type="string">
            <text:p>13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REQ301-H" office:value-type="string">
            <text:p>REQ301-H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ENG301-L" office:value-type="string">
            <text:p>ENG301-L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ENG301-D" office:value-type="string">
            <text:p>ENG3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BDD401-K" office:value-type="string">
            <text:p>BDD401-K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ST301-C" office:value-type="string">
            <text:p>EST3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SO401-LM" office:value-type="string">
            <text:p>SO401-LM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ISW401-A" office:value-type="string">
            <text:p>ISW4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EST301-Z" office:value-type="string">
            <text:p>EST301-Z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BDD401-B" office:value-type="string">
            <text:p>BDD4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ISW401-D" office:value-type="string">
            <text:p>ISW4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SO401-C" office:value-type="string">
            <text:p>SO4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FPR101-A" office:value-type="string">
            <text:p>FPR1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MAT101-A" office:value-type="string">
            <text:p>MAT101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LOG204-C" office:value-type="string">
            <text:p>LOG204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COM102-B" office:value-type="string">
            <text:p>COM102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ING202-F" office:value-type="string">
            <text:p>ING202-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POO201-A" office:value-type="string">
            <text:p>POO2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CAL201-B" office:value-type="string">
            <text:p>CAL2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ARG201-C" office:value-type="string">
            <text:p>ARG2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ENG201-A" office:value-type="string">
            <text:p>ENG201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RED401-V" office:value-type="string">
            <text:p>RED401-V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RED401-E" office:value-type="string">
            <text:p>RED401-E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FPR101-C" office:value-type="string">
            <text:p>FPR101-C</text:p>
          </table:table-cell>
          <table:table-cell calcext:value-type="string" office:string-value="30" office:value-type="string">
            <text:p>30</text:p>
          </table:table-cell>
          <table:table-cell/>
        </table:table-row>
      </table:table>
      <table:table table:name="GroupSchedule" table:style-name="ta1">
        <table:table-column table:default-cell-style-name="ce3" table:style-name="co9"/>
        <table:table-column table:default-cell-style-name="ce3" table:number-columns-repeated="2" table:style-name="co1"/>
        <table:table-column table:default-cell-style-name="ce3" table:style-name="co10"/>
        <table:table-column table:default-cell-style-name="ce3" table:style-name="co4"/>
        <table:table-column table:default-cell-style-name="ce3" table:style-name="co9"/>
        <table:table-row table:style-name="ro1">
          <table:table-cell calcext:value-type="string" office:value-type="string">
            <text:p>groupShedule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dayOfWeek</text:p>
          </table:table-cell>
          <table:table-cell calcext:value-type="string" office:value-type="string">
            <text:p>startTime</text:p>
          </table:table-cell>
          <table:table-cell calcext:value-type="string" office:value-type="string">
            <text:p>endTime</text:p>
          </table:table-cell>
          <table:table-cell calcext:value-type="string" office:value-type="string">
            <text:p>classroom</text:p>
          </table:table-cell>
        </table:table-row>
        <table:table-row>
          <table:table-cell calcext:value-type="string" office:string-value="44" office:value-type="string">
            <text:p>44</text:p>
          </table:table-cell>
          <table:table-cell calcext:value-type="string" office:string-value="29" office:value-type="string">
            <text:p>2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6:00:00 PM" office:value-type="string">
            <text:p>06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5" office:value-type="string">
            <text:p>45</text:p>
          </table:table-cell>
          <table:table-cell calcext:value-type="string" office:string-value="30" office:value-type="string">
            <text:p>3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6" office:value-type="string">
            <text:p>46</text:p>
          </table:table-cell>
          <table:table-cell calcext:value-type="string" office:string-value="31" office:value-type="string">
            <text:p>3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7" office:value-type="string">
            <text:p>47</text:p>
          </table:table-cell>
          <table:table-cell calcext:value-type="string" office:string-value="31" office:value-type="string">
            <text:p>3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8" office:value-type="string">
            <text:p>48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9" office:value-type="string">
            <text:p>49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0" office:value-type="string">
            <text:p>50</text:p>
          </table:table-cell>
          <table:table-cell calcext:value-type="string" office:string-value="33" office:value-type="string">
            <text:p>3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1" office:value-type="string">
            <text:p>51</text:p>
          </table:table-cell>
          <table:table-cell calcext:value-type="string" office:string-value="34" office:value-type="string">
            <text:p>3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2" office:value-type="string">
            <text:p>52</text:p>
          </table:table-cell>
          <table:table-cell calcext:value-type="string" office:string-value="35" office:value-type="string">
            <text:p>3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3" office:value-type="string">
            <text:p>53</text:p>
          </table:table-cell>
          <table:table-cell calcext:value-type="string" office:string-value="36" office:value-type="string">
            <text:p>3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4" office:value-type="string">
            <text:p>54</text:p>
          </table:table-cell>
          <table:table-cell calcext:value-type="string" office:string-value="36" office:value-type="string">
            <text:p>3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5" office:value-type="string">
            <text:p>55</text:p>
          </table:table-cell>
          <table:table-cell calcext:value-type="string" office:string-value="37" office:value-type="string">
            <text:p>3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6" office:value-type="string">
            <text:p>56</text:p>
          </table:table-cell>
          <table:table-cell calcext:value-type="string" office:string-value="37" office:value-type="string">
            <text:p>3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7" office:value-type="string">
            <text:p>57</text:p>
          </table:table-cell>
          <table:table-cell calcext:value-type="string" office:string-value="38" office:value-type="string">
            <text:p>3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8" office:value-type="string">
            <text:p>58</text:p>
          </table:table-cell>
          <table:table-cell calcext:value-type="string" office:string-value="38" office:value-type="string">
            <text:p>3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9" office:value-type="string">
            <text:p>59</text:p>
          </table:table-cell>
          <table:table-cell calcext:value-type="string" office:string-value="39" office:value-type="string">
            <text:p>3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6:00:00 PM" office:value-type="string">
            <text:p>06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60" office:value-type="string">
            <text:p>60</text:p>
          </table:table-cell>
          <table:table-cell calcext:value-type="string" office:string-value="40" office:value-type="string">
            <text:p>4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61" office:value-type="string">
            <text:p>61</text:p>
          </table:table-cell>
          <table:table-cell calcext:value-type="string" office:string-value="GRP40" office:value-type="string">
            <text:p>GRP40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6:00:00 AM" office:value-type="string">
            <text:p>06:00:00 AM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J-404" office:value-type="string">
            <text:p>J-404</text:p>
          </table:table-cell>
        </table:table-row>
        <table:table-row>
          <table:table-cell calcext:value-type="string" office:string-value="62" office:value-type="string">
            <text:p>62</text:p>
          </table:table-cell>
          <table:table-cell calcext:value-type="string" office:string-value="GRP40" office:value-type="string">
            <text:p>GRP4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k-203" office:value-type="string">
            <text:p>k-203</text:p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13" office:value-type="string">
            <text:p>1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1" office:value-type="string">
            <text:p>41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2" office:value-type="string">
            <text:p>42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3" office:value-type="string">
            <text:p>43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</table:table>
      <table:table table:name="Teachers" table:style-name="ta1">
        <table:table-column table:default-cell-style-name="ce3" table:style-name="co1"/>
        <table:table-column table:default-cell-style-name="ce3" table:style-name="co11"/>
        <table:table-row table:style-name="ro1">
          <table:table-cell calcext:value-type="string" office:value-type="string">
            <text:p>teacherId</text:p>
          </table:table-cell>
          <table:table-cell calcext:value-type="string" office:value-type="string">
            <text:p>name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Valentina Hernández" office:value-type="string">
            <text:p>Valentina Hernández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Daniel Torres" office:value-type="string">
            <text:p>Daniel Torres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Camila Ramírez" office:value-type="string">
            <text:p>Camila Ramírez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Sebastián Castro" office:value-type="string">
            <text:p>Sebastián Castro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Isabella Vargas" office:value-type="string">
            <text:p>Isabella Varga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Carlos Gomez" office:value-type="string">
            <text:p>Carlos Gomez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Ana Rodriguez" office:value-type="string">
            <text:p>Ana Rodriguez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Luis Martinez" office:value-type="string">
            <text:p>Luis Martinez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Sandra Perez" office:value-type="string">
            <text:p>Sandra Perez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Diego Herrera" office:value-type="string">
            <text:p>Diego Herrera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Juan Pérez" office:value-type="string">
            <text:p>Juan Pérez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María González" office:value-type="string">
            <text:p>María González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Carlos Rodríguez" office:value-type="string">
            <text:p>Carlos Rodríguez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Sofía Martínez" office:value-type="string">
            <text:p>Sofía Martínez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Andrés López" office:value-type="string">
            <text:p>Andrés López</text:p>
          </table:table-cell>
        </table:table-row>
      </table:table>
      <table:table table:name="Users" table:style-name="ta1">
        <table:table-column table:default-cell-style-name="Default" table:number-columns-repeated="14" table:style-name="co1"/>
        <table:table-row table:style-name="ro1">
          <table:table-cell calcext:value-type="string" office:value-type="string">
            <text:p>idUser</text:p>
          </table:table-cell>
          <table:table-cell calcext:value-type="string" office:value-type="string">
            <text:p>firstName</text:p>
          </table:table-cell>
          <table:table-cell calcext:value-type="string" office:value-type="string">
            <text:p>lastName</text:p>
          </table:table-cell>
          <table:table-cell calcext:value-type="string" office:value-type="string">
            <text:p>documentType</text:p>
          </table:table-cell>
          <table:table-cell calcext:value-type="string" office:value-type="string">
            <text:p>documentNumber</text:p>
          </table:table-cell>
          <table:table-cell calcext:value-type="string" office:value-type="string">
            <text:p>birthDate</text:p>
          </table:table-cell>
          <table:table-cell calcext:value-type="string" office:value-type="string">
            <text:p>gender</text:p>
          </table:table-cell>
          <table:table-cell calcext:value-type="string" office:value-type="string">
            <text:p>phoneNumber</text:p>
          </table:table-cell>
          <table:table-cell calcext:value-type="string" office:value-type="string">
            <text:p>address</text:p>
          </table:table-cell>
          <table:table-cell calcext:value-type="string" office:value-type="string">
            <text:p>email</text:p>
          </table:table-cell>
          <table:table-cell calcext:value-type="string" office:value-type="string">
            <text:p>passwor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role</text:p>
          </table:table-cell>
          <table:table-cell calcext:value-type="string" office:value-type="string">
            <text:p>cratedAt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Juan" office:value-type="string">
            <text:p>Juan</text:p>
          </table:table-cell>
          <table:table-cell calcext:value-type="string" office:string-value="Pérez" office:value-type="string">
            <text:p>Pér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9" office:value-type="string">
            <text:p>123456789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uan.perez@email.com" office:value-type="string">
            <text:p>juan.perez@email.com</text:p>
          </table:table-cell>
          <table:table-cell calcext:value-type="string" office:string-value="$2a$10$wDxp0zf/UGZq8QfJxn4A1OPTSzy8OYDBhAS5q45fxQy.V1GjvOwSy" office:value-type="string">
            <text:p>$2a$10$wDxp0zf/UGZq8QfJxn4A1OPTSzy8OYDBhAS5q45fxQy.V1GjvOwSy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38:06.433237752" office:value-type="string">
            <text:p>2026-06-01T04:38:06.433237752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Ana" office:value-type="string">
            <text:p>Ana</text:p>
          </table:table-cell>
          <table:table-cell calcext:value-type="string" office:string-value="Gomez" office:value-type="string">
            <text:p>Gom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6" office:value-type="string">
            <text:p>123456786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ana.gomez@email.com" office:value-type="string">
            <text:p>ana.gomez@email.com</text:p>
          </table:table-cell>
          <table:table-cell calcext:value-type="string" office:string-value="$2a$10$qGimAV51KyRz0u9nayvHjeYSkdYrpHh117JFRE/r1w8AYhw9pvOum" office:value-type="string">
            <text:p>$2a$10$qGimAV51KyRz0u9nayvHjeYSkdYrpHh117JFRE/r1w8AYhw9pvOum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44:57.075978448" office:value-type="string">
            <text:p>2026-06-01T04:44:57.075978448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Pepe" office:value-type="string">
            <text:p>Pepe</text:p>
          </table:table-cell>
          <table:table-cell calcext:value-type="string" office:string-value="Pepinillo" office:value-type="string">
            <text:p>Pepinillo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274233" office:value-type="string">
            <text:p>46274233</text:p>
          </table:table-cell>
          <table:table-cell calcext:value-type="string" office:string-value="2004-06-12" office:value-type="string">
            <text:p>2004-06-12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476382837" office:value-type="string">
            <text:p>476382837</text:p>
          </table:table-cell>
          <table:table-cell calcext:value-type="string" office:string-value="Cucuta" office:value-type="string">
            <text:p>Cucuta</text:p>
          </table:table-cell>
          <table:table-cell calcext:value-type="string" office:string-value="pepe@gmail.com" office:value-type="string">
            <text:p>pepe@gmail.com</text:p>
          </table:table-cell>
          <table:table-cell calcext:value-type="string" office:string-value="$2a$10$kmI.mrpNUsRzR/cNwRohceklkkK18XfPVKWl0rSqYOiw2yUQm/nMK" office:value-type="string">
            <text:p>$2a$10$kmI.mrpNUsRzR/cNwRohceklkkK18XfPVKWl0rSqYOiw2yUQm/nMK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2:47:27.838447007" office:value-type="string">
            <text:p>2026-06-12T22:47:27.838447007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Pepe" office:value-type="string">
            <text:p>Pepe</text:p>
          </table:table-cell>
          <table:table-cell calcext:value-type="string" office:string-value="Pepinillo" office:value-type="string">
            <text:p>Pepinillo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2742323" office:value-type="string">
            <text:p>462742323</text:p>
          </table:table-cell>
          <table:table-cell calcext:value-type="string" office:string-value="2004-06-12" office:value-type="string">
            <text:p>2004-06-12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476382837" office:value-type="string">
            <text:p>476382837</text:p>
          </table:table-cell>
          <table:table-cell calcext:value-type="string" office:string-value="Cucuta" office:value-type="string">
            <text:p>Cucuta</text:p>
          </table:table-cell>
          <table:table-cell calcext:value-type="string" office:string-value="pepe2@gmail.com" office:value-type="string">
            <text:p>pepe2@gmail.com</text:p>
          </table:table-cell>
          <table:table-cell calcext:value-type="string" office:string-value="$2a$10$Zx5Sg5l30XVzFNpQS.0p9.JqNaXgJL8SIGwAPp0rzEhhQxZmz7YaS" office:value-type="string">
            <text:p>$2a$10$Zx5Sg5l30XVzFNpQS.0p9.JqNaXgJL8SIGwAPp0rzEhhQxZmz7YaS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2:48:02.189395849" office:value-type="string">
            <text:p>2026-06-12T22:48:02.189395849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Camilo" office:value-type="string">
            <text:p>Camilo</text:p>
          </table:table-cell>
          <table:table-cell calcext:value-type="string" office:string-value="Sierra" office:value-type="string">
            <text:p>Sierr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324577" office:value-type="string">
            <text:p>324577</text:p>
          </table:table-cell>
          <table:table-cell calcext:value-type="string" office:string-value="2006-06-15" office:value-type="string">
            <text:p>2006-06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7683456" office:value-type="string">
            <text:p>7683456</text:p>
          </table:table-cell>
          <table:table-cell calcext:value-type="string" office:string-value="Colombia" office:value-type="string">
            <text:p>Colombia</text:p>
          </table:table-cell>
          <table:table-cell calcext:value-type="string" office:string-value="camilo@gmail.com" office:value-type="string">
            <text:p>camilo@gmail.com</text:p>
          </table:table-cell>
          <table:table-cell calcext:value-type="string" office:string-value="$2a$10$fgtOW95SMFReYkcpiUBBK.IzTYEBK1ubk3z3xvJAEqpAec3bw55Pa" office:value-type="string">
            <text:p>$2a$10$fgtOW95SMFReYkcpiUBBK.IzTYEBK1ubk3z3xvJAEqpAec3bw55Pa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3:05:21.531249294" office:value-type="string">
            <text:p>2026-06-12T23:05:21.531249294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Admin" office:value-type="string">
            <text:p>Admin</text:p>
          </table:table-cell>
          <table:table-cell calcext:value-type="string" office:string-value="Gomez" office:value-type="string">
            <text:p>Gom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427639947" office:value-type="string">
            <text:p>1427639947</text:p>
          </table:table-cell>
          <table:table-cell calcext:value-type="string" office:string-value="2000-05-15" office:value-type="string">
            <text:p>2000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admin@gmail.com" office:value-type="string">
            <text:p>admin@gmail.com</text:p>
          </table:table-cell>
          <table:table-cell calcext:value-type="string" office:string-value="$2a$10$rQrtmZi82jQaCDXqYUJedOdYqh4mFUkwnDwscFcW6Ch0zsAkhWFT." office:value-type="string">
            <text:p>$2a$10$rQrtmZi82jQaCDXqYUJedOdYqh4mFUkwnDwscFcW6Ch0zsAkhWFT.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ADMIN" office:value-type="string">
            <text:p>ADMIN</text:p>
          </table:table-cell>
          <table:table-cell calcext:value-type="string" office:string-value="2026-06-19T14:49:52.472652532" office:value-type="string">
            <text:p>2026-06-19T14:49:52.472652532</text:p>
          </table:table-cell>
        </table:table-row>
        <table:table-row>
          <table:table-cell calcext:value-type="string" office:string-value="USR3" office:value-type="string">
            <text:p>USR3</text:p>
          </table:table-cell>
          <table:table-cell calcext:value-type="string" office:string-value="Joan Sebastian" office:value-type="string">
            <text:p>Joan Sebastian</text:p>
          </table:table-cell>
          <table:table-cell calcext:value-type="string" office:string-value="Vergara Valencia" office:value-type="string">
            <text:p>Vergara Valenci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3234338" office:value-type="string">
            <text:p>3234338</text:p>
          </table:table-cell>
          <table:table-cell calcext:value-type="string" office:string-value="2005-05-15" office:value-type="string">
            <text:p>2005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oansebastian@gmail.com" office:value-type="string">
            <text:p>joansebastian@gmail.com</text:p>
          </table:table-cell>
          <table:table-cell calcext:value-type="string" office:string-value="$2a$10$LagSmVSGn/UUPBwzIXnSiuElc/U6yribdu5sWzP5qJ2duyzAFI.ou" office:value-type="string">
            <text:p>$2a$10$LagSmVSGn/UUPBwzIXnSiuElc/U6yribdu5sWzP5qJ2duyzAFI.ou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13:19:32.045600729" office:value-type="string">
            <text:p>2026-06-12T13:19:32.045600729</text:p>
          </table:table-cell>
        </table:table-row>
      </table:table>
      <table:table table:name="Students" table:style-name="ta1">
        <table:table-column table:default-cell-style-name="Default" table:number-columns-repeated="3" table:style-name="co1"/>
        <table:table-column table:default-cell-style-name="Default" table:style-name="co12"/>
        <table:table-row table:style-name="ro1">
          <table:table-cell calcext:value-type="string" office:value-type="string">
            <text:p>studentId</text:p>
          </table:table-cell>
          <table:table-cell calcext:value-type="string" office:value-type="string">
            <text:p>studentCod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academicProgram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56526302" office:value-type="string">
            <text:p>5652630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33054516" office:value-type="string">
            <text:p>3305451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3787465" office:value-type="string">
            <text:p>63787465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STU5" office:value-type="string">
            <text:p>STU5</text:p>
          </table:table-cell>
          <table:table-cell calcext:value-type="string" office:string-value="86438676" office:value-type="string">
            <text:p>86438676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STU4" office:value-type="string">
            <text:p>STU4</text:p>
          </table:table-cell>
          <table:table-cell calcext:value-type="string" office:string-value="41868525" office:value-type="string">
            <text:p>41868525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STU3" office:value-type="string">
            <text:p>STU3</text:p>
          </table:table-cell>
          <table:table-cell calcext:value-type="string" office:string-value="78900205" office:value-type="string">
            <text:p>78900205</text:p>
          </table:table-cell>
          <table:table-cell calcext:value-type="string" office:string-value="USR3" office:value-type="string">
            <text:p>USR3</text:p>
          </table:table-cell>
          <table:table-cell calcext:value-type="string" office:string-value="" office:value-type="string">
            <text:p/>
          </table:table-cell>
        </table:table-row>
      </table:table>
      <table:table table:name="Enrollments" table:style-name="ta1">
        <table:table-column table:default-cell-style-name="Default" table:number-columns-repeated="3" table:style-name="co1"/>
        <table:table-column table:default-cell-style-name="Default" table:style-name="co13"/>
        <table:table-column table:default-cell-style-name="Default" table:style-name="co1"/>
        <table:table-row table:style-name="ro1">
          <table:table-cell calcext:value-type="string" office:value-type="string">
            <text:p>enrollment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academicProgramId</text:p>
          </table:table-cell>
          <table:table-cell calcext:value-type="string" office:value-type="string">
            <text:p>enrollmentDate</text:p>
          </table:table-cell>
          <table:table-cell calcext:value-type="string" office:value-type="string">
            <text:p>academicPeriod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22" office:value-type="string">
            <text:p>2026-06-22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23" office:value-type="string">
            <text:p>2026-06-23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24" office:value-type="string">
            <text:p>2026-06-24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ENR3" office:value-type="string">
            <text:p>ENR3</text:p>
          </table:table-cell>
          <table:table-cell calcext:value-type="string" office:string-value="STU3" office:value-type="string">
            <text:p>STU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ENR4" office:value-type="string">
            <text:p>ENR4</text:p>
          </table:table-cell>
          <table:table-cell calcext:value-type="string" office:string-value="STU5" office:value-type="string">
            <text:p>STU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ENR5" office:value-type="string">
            <text:p>ENR5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</table:table>
      <table:table table:name="EnrollmentDetails" table:style-name="ta1">
        <table:table-column table:default-cell-style-name="Default" table:number-columns-repeated="5" table:style-name="co1"/>
        <table:table-row table:style-name="ro1">
          <table:table-cell calcext:value-type="string" office:value-type="string">
            <text:p>enrollmentDetailId</text:p>
          </table:table-cell>
          <table:table-cell calcext:value-type="string" office:value-type="string">
            <text:p>enrollment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finalGrade</text:p>
          </table:table-cell>
        </table:table-row>
        <table:table-row>
          <table:table-cell calcext:value-type="string" office:string-value="ED23" office:value-type="string">
            <text:p>ED23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4" office:value-type="string">
            <text:p>ED24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5" office:value-type="string">
            <text:p>ED25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6" office:value-type="string">
            <text:p>ED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7" office:value-type="string">
            <text:p>ED27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COMPLETED" office:value-type="string">
            <text:p>COMPLETED</text:p>
          </table:table-cell>
          <table:table-cell calcext:value-type="string" office:string-value="4.5" office:value-type="string">
            <text:p>4.5</text:p>
          </table:table-cell>
        </table:table-row>
        <table:table-row>
          <table:table-cell calcext:value-type="string" office:string-value="ED28" office:value-type="string">
            <text:p>ED2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9" office:value-type="string">
            <text:p>ED2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0" office:value-type="string">
            <text:p>ED30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1" office:value-type="string">
            <text:p>ED3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2" office:value-type="string">
            <text:p>ED3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1" office:value-type="string">
            <text:p>ED11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3" office:value-type="string">
            <text:p>ED33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2" office:value-type="string">
            <text:p>ED12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4" office:value-type="string">
            <text:p>ED34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3" office:value-type="string">
            <text:p>ED13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4" office:value-type="string">
            <text:p>ED14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5" office:value-type="string">
            <text:p>ED15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6" office:value-type="string">
            <text:p>ED16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7" office:value-type="string">
            <text:p>ED17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8" office:value-type="string">
            <text:p>ED18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9" office:value-type="string">
            <text:p>ED19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0" office:value-type="string">
            <text:p>ED20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1" office:value-type="string">
            <text:p>ED21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COMPLETED" office:value-type="string">
            <text:p>COMPLETED</text:p>
          </table:table-cell>
          <table:table-cell calcext:value-type="string" office:string-value="3.2" office:value-type="string">
            <text:p>3.2</text:p>
          </table:table-cell>
        </table:table-row>
        <table:table-row>
          <table:table-cell calcext:value-type="string" office:string-value="ED22" office:value-type="string">
            <text:p>ED22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</table:table>
      <table:table table:name="AcademicHistory" table:style-name="ta1">
        <table:table-column table:default-cell-style-name="Default" table:number-columns-repeated="2" table:style-name="co1"/>
        <table:table-column table:default-cell-style-name="Default" table:style-name="co6"/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academicHistory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enrollmentDetailId</text:p>
          </table:table-cell>
          <table:table-cell calcext:value-type="string" office:value-type="string">
            <text:p>grade</text:p>
          </table:table-cell>
          <table:table-cell calcext:value-type="string" office:value-type="string">
            <text:p>statu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STU6" office:value-type="string">
            <text:p>STU6</text:p>
          </table:table-cell>
          <table:table-cell calcext:value-type="string" office:string-value="5" office:value-type="string">
            <text:p>5</text:p>
          </table:table-cell>
          <table:table-cell calcext:value-type="string" office:value="0.0" office:value-type="float">
            <text:p>0.0</text:p>
          </table:table-cell>
          <table:table-cell calcext:value-type="string" office:string-value="IN_PROGRESS" office:value-type="string">
            <text:p>IN_PROGRESS</text:p>
          </table:table-cell>
        </table:table-row>
      </table:table>
      <table:table table:name="AcademicPeriod" table:style-name="ta1">
        <table:table-column table:default-cell-style-name="Default" table:number-columns-repeated="6" table:style-name="co1"/>
        <table:table-row table:style-name="ro1">
          <table:table-cell calcext:value-type="string" office:value-type="string">
            <text:p>academicPeriodId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startDate</text:p>
          </table:table-cell>
          <table:table-cell calcext:value-type="string" office:value-type="string">
            <text:p>endDate</text:p>
          </table:table-cell>
          <table:table-cell calcext:value-type="string" office:value-type="string">
            <text:p>statu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2026-2" office:value-type="string">
            <text:p>2026-2</text:p>
          </table:table-cell>
          <table:table-cell calcext:value-type="string" office:string-value="Segundo Periodo Academico del 2026" office:value-type="string">
            <text:p>Segundo Periodo Academico del 2026</text:p>
          </table:table-cell>
          <table:table-cell calcext:value-type="string" office:string-value="2026-08-03" office:value-type="string">
            <text:p>2026-08-03</text:p>
          </table:table-cell>
          <table:table-cell calcext:value-type="string" office:string-value="2026-12-16" office:value-type="string">
            <text:p>2026-12-16</text:p>
          </table:table-cell>
          <table:table-cell calcext:value-type="string" office:string-value="CLOSED" office:value-type="string">
            <text:p>CLOSED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027-1" office:value-type="string">
            <text:p>2027-1</text:p>
          </table:table-cell>
          <table:table-cell calcext:value-type="string" office:string-value="Periodo academico para 2027-1" office:value-type="string">
            <text:p>Periodo academico para 2027-1</text:p>
          </table:table-cell>
          <table:table-cell calcext:value-type="string" office:string-value="2027-02-14" office:value-type="string">
            <text:p>2027-02-14</text:p>
          </table:table-cell>
          <table:table-cell calcext:value-type="string" office:string-value="2027-06-17" office:value-type="string">
            <text:p>2027-06-17</text:p>
          </table:table-cell>
          <table:table-cell calcext:value-type="string" office:string-value="CLOSED" office:value-type="string">
            <text:p>CLOSED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027-2" office:value-type="string">
            <text:p>2027-2</text:p>
          </table:table-cell>
          <table:table-cell calcext:value-type="string" office:string-value="Periodo academico del 2027-2" office:value-type="string">
            <text:p>Periodo academico del 2027-2</text:p>
          </table:table-cell>
          <table:table-cell calcext:value-type="string" office:string-value="2027-08-06" office:value-type="string">
            <text:p>2027-08-06</text:p>
          </table:table-cell>
          <table:table-cell calcext:value-type="string" office:string-value="2027-12-16" office:value-type="string">
            <text:p>2027-12-16</text:p>
          </table:table-cell>
          <table:table-cell calcext:value-type="string" office:string-value="CLOSED" office:value-type="string">
            <text:p>CLOSED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028-1" office:value-type="string">
            <text:p>2028-1</text:p>
          </table:table-cell>
          <table:table-cell calcext:value-type="string" office:string-value="Periodo academico para 2028-1" office:value-type="string">
            <text:p>Periodo academico para 2028-1</text:p>
          </table:table-cell>
          <table:table-cell calcext:value-type="string" office:string-value="2028-02-14" office:value-type="string">
            <text:p>2028-02-14</text:p>
          </table:table-cell>
          <table:table-cell calcext:value-type="string" office:string-value="2028-06-16" office:value-type="string">
            <text:p>2028-06-16</text:p>
          </table:table-cell>
          <table:table-cell calcext:value-type="string" office:string-value="ACTIVE" office:value-type="string">
            <text:p>A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styles>
    <style:default-style style:family="table-cell">
      <style:paragraph-properties style:tab-stop-distance="0.5in"/>
      <style:text-properties fo:country="US" fo:font-size="10pt" fo:language="en" style:country-asian="CN" style:country-complex="IN" style:font-name="Liberation Sans" style:font-name-asian="Noto Sans CJK SC" style:font-name-complex="Noto Sans Devanagari" style:font-size-asian="10pt" style:font-size-complex="10pt" style:language-asian="zh" style:language-complex="hi"/>
    </style:default-style>
    <style:default-style style:family="graphic">
      <style:graphic-properties draw:fill-color="#729fcf" draw:shadow-offset-x="0.1181in" draw:shadow-offset-y="0.1181in" fo:wrap-option="no-wrap" style:writing-mode="page" svg:stroke-color="#3465a4"/>
      <style:paragraph-properties loext:tab-stop-distance="0in" style:font-independent-line-spacing="false" style:line-break="strict" style:punctuation-wrap="simple" style:text-autospace="ideograph-alpha" style:writing-mode="page">
        <style:tab-stops/>
      </style:paragraph-properties>
      <style:text-properties fo:country="US" fo:font-family="'Liberation Serif'" fo:font-size="12pt" fo:language="en" loext:opacity="0%" style:country-asian="CN" style:country-complex="IN" style:font-family-asian="'DejaVu Sans'" style:font-family-complex="'Noto Sans'" style:font-family-generic="roman" style:font-family-generic-asian="system" style:font-family-generic-complex="system" style:font-pitch="variable" style:font-pitch-asian="variable" style:font-pitch-complex="variable" style:font-size-asian="12pt" style:font-size-complex="12pt" style:language-asian="zh" style:language-complex="hi" style:letter-kerning="true" style:use-window-font-color="true"/>
    </style:default-style>
    <style:style style:family="graphic" style:name="Default"/>
    <style:style style:family="graphic" style:name="Note" style:parent-style-name="Default">
      <style:graphic-properties draw:auto-grow-height="true" draw:auto-grow-width="false" draw:fill="solid" draw:fill-color="#ffffc0" draw:marker-start="Arrowheads_20_1" draw:marker-start-center="false" draw:marker-start-width="0.0787in" draw:shadow="visible" draw:shadow-offset-x="0.0394in" draw:shadow-offset-y="0.0394in" draw:stroke="solid" fo:padding-bottom="0.0394in" fo:padding-left="0.0394in" fo:padding-right="0.0394in" fo:padding-top="0.0394in"/>
      <style:text-properties fo:font-family="'Liberation Sans'" fo:font-size="10pt"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" style:font-pitch="variable" style:font-pitch-asian="variable" style:font-pitch-complex="variable" style:font-size-asian="10pt" style:font-size-complex="10pt"/>
    </style:style>
    <number:number-style style:name="N0">
      <number:number number:min-integer-digits="1"/>
    </number:number-style>
    <style:style style:family="table-cell" style:name="Default"/>
    <style:style style:family="table-cell" style:name="Heading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ize-complex="24pt" style:font-style-asian="normal" style:font-style-complex="normal" style:font-weight-asian="bold" style:font-weight-complex="bold"/>
    </style:style>
    <style:style style:display-name="Heading 1" style:family="table-cell" style:name="Heading_20_1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display-name="Heading 2" style:family="table-cell" style:name="Heading_20_2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family="table-cell" style:name="Text" style:parent-style-name="Default">
      <style:table-cell-properties fo:wrap-option="no-wrap" style:shrink-to-fit="false"/>
    </style:style>
    <style:style style:family="table-cell" style:name="Note" style:parent-style-name="Text">
      <style:table-cell-properties fo:background-color="#ffffcc" fo:border="0.74pt solid #808080" fo:wrap-option="no-wrap" style:diagonal-bl-tr="none" style:diagonal-tl-br="none" style:shrink-to-fit="false"/>
      <style:text-properties fo:color="#333333"/>
    </style:style>
    <style:style style:family="table-cell" style:name="Footnote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family="table-cell" style:name="Hyperlink" style:parent-style-name="Text">
      <style:table-cell-properties fo:wrap-option="no-wrap" style:shrink-to-fit="false"/>
      <style:text-properties fo:color="#0000ee" style:text-underline-color="#0000ee" style:text-underline-style="solid" style:text-underline-width="auto"/>
    </style:style>
    <style:style style:family="table-cell" style:name="Status" style:parent-style-name="Default">
      <style:table-cell-properties fo:wrap-option="no-wrap" style:shrink-to-fit="false"/>
    </style:style>
    <style:style style:family="table-cell" style:name="Good" style:parent-style-name="Status">
      <style:table-cell-properties fo:background-color="#ccffcc" fo:wrap-option="no-wrap" style:shrink-to-fit="false"/>
      <style:text-properties fo:color="#006600"/>
    </style:style>
    <style:style style:family="table-cell" style:name="Neutral" style:parent-style-name="Status">
      <style:table-cell-properties fo:background-color="#ffffcc" fo:wrap-option="no-wrap" style:shrink-to-fit="false"/>
      <style:text-properties fo:color="#996600"/>
    </style:style>
    <style:style style:family="table-cell" style:name="Bad" style:parent-style-name="Status">
      <style:table-cell-properties fo:background-color="#ffcccc" fo:wrap-option="no-wrap" style:shrink-to-fit="false"/>
      <style:text-properties fo:color="#cc0000"/>
    </style:style>
    <style:style style:family="table-cell" style:name="Warning" style:parent-style-name="Status">
      <style:table-cell-properties fo:wrap-option="no-wrap" style:shrink-to-fit="false"/>
      <style:text-properties fo:color="#cc0000"/>
    </style:style>
    <style:style style:family="table-cell" style:name="Error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family="table-cell" style:name="Accent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display-name="Accent 1" style:family="table-cell" style:name="Accent_20_1" style:parent-style-name="Accent">
      <style:table-cell-properties fo:background-color="#000000" fo:wrap-option="no-wrap" style:shrink-to-fit="false"/>
      <style:text-properties fo:color="#ffffff"/>
    </style:style>
    <style:style style:display-name="Accent 2" style:family="table-cell" style:name="Accent_20_2" style:parent-style-name="Accent">
      <style:table-cell-properties fo:background-color="#808080" fo:wrap-option="no-wrap" style:shrink-to-fit="false"/>
      <style:text-properties fo:color="#ffffff"/>
    </style:style>
    <style:style style:display-name="Accent 3" style:family="table-cell" style:name="Accent_20_3" style:parent-style-name="Accent">
      <style:table-cell-properties fo:background-color="#dddddd" fo:wrap-option="no-wrap" style:shrink-to-fit="false"/>
    </style:style>
    <style:style style:family="table-cell" style:name="Result" style:parent-style-name="Default">
      <style:table-cell-properties fo:wrap-option="no-wrap" style:shrink-to-fit="false"/>
      <style:text-properties fo:font-style="italic" fo:font-weight="bold" style:font-style-asian="italic" style:font-style-complex="italic" style:font-weight-asian="bold" style:font-weight-complex="bold" style:text-underline-color="font-color" style:text-underline-style="solid" style:text-underline-width="auto"/>
    </style:style>
    <draw:marker draw:display-name="Arrowheads 1" draw:name="Arrowheads_20_1" svg:d="M10 0l-10 30h20z" svg:viewBox="0 0 20 30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argin-bottom="0.0984in" fo:margin-left="0in" fo:margin-right="0in" fo:min-height="0.2953in"/>
      </style:header-style>
      <style:footer-style>
        <style:header-footer-properties fo:margin-left="0in" fo:margin-right="0in" fo:margin-top="0.0984in" fo:min-height="0.2953in"/>
      </style:footer-style>
    </style:page-layout>
    <style:page-layout style:name="Mpm2">
      <style:page-layout-properties style:writing-mode="lr-tb"/>
      <style:header-style>
        <style:header-footer-properties fo:background-color="#c0c0c0" fo:border="1.5pt solid #000000" fo:margin-bottom="0.0984in" fo:margin-left="0in" fo:margin-right="0in" fo:min-height="0.2953in" fo:padding="0.0071in">
          <style:background-image/>
        </style:header-footer-properties>
      </style:header-style>
      <style:footer-style>
        <style:header-footer-properties fo:background-color="#c0c0c0" fo:border="1.5pt solid #000000" fo:margin-left="0in" fo:margin-right="0in" fo:margin-top="0.0984in" fo:min-height="0.2953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/00/0000</text:date>, <text:time style:data-style-name="N2" text:time-value="00:31:25.844970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3:21.302510109</meta:creation-date>
    <meta:generator>LibreOffice/24.2.7.2$Linux_X86_64 LibreOffice_project/420$Build-2</meta:generator>
    <dc:date>2026-06-24T00:33:00.057578060</dc:date>
    <meta:editing-duration>P1DT10H1M19S</meta:editing-duration>
    <meta:editing-cycles>38</meta:editing-cycles>
    <meta:document-statistic meta:table-count="16" meta:cell-count="1361" meta:object-count="0"/>
  </office:meta>
</office:document-meta>
</file>