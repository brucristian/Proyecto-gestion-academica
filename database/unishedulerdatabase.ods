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1.372in"/>
    </style:style>
    <style:style style:family="table-column" style:name="co13">
      <style:table-column-properties fo:break-before="auto" style:column-width="1.050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2" office:value-type="string">
            <text:p>22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4" office:value-type="string">
            <text:p>2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5" office:value-type="string">
            <text:p>2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7" office:value-type="string">
            <text:p>27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9" office:value-type="string">
            <text:p>29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1" office:value-type="string">
            <text:p>3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2" office:value-type="string">
            <text:p>32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3" office:value-type="string">
            <text:p>33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4" office:value-type="string">
            <text:p>34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5" office:value-type="string">
            <text:p>3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6" office:value-type="string">
            <text:p>36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5" office:value-type="string">
            <text:p>15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7" office:value-type="string">
            <text:p>37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8" office:value-type="string">
            <text:p>38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9" office:value-type="string">
            <text:p>39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8" office:value-type="string">
            <text:p>18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9" office:value-type="string">
            <text:p>19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40" office:value-type="string">
            <text:p>40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20" office:value-type="string">
            <text:p>20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1" office:value-type="string">
            <text:p>21</text:p>
          </table:table-cell>
        </table:table-row>
      </table:table>
      <table:table table:name="Prerequisite" table:style-name="ta1">
        <table:table-column table:default-cell-style-name="ce3" table:style-name="co1"/>
        <table:table-column table:default-cell-style-name="ce3" table:style-name="co5"/>
        <table:table-column table:default-cell-style-name="ce3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21" office:value-type="string">
            <text:p>2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3" table:style-name="co1"/>
        <table:table-column table:default-cell-style-name="ce3" table:style-name="co7"/>
        <table:table-column table:default-cell-style-name="ce3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Electiva I" office:value-type="string">
            <text:p>Electiva I</text:p>
          </table:table-cell>
          <table:table-cell calcext:value-type="string" office:string-value="ELC001" office:value-type="string">
            <text:p>ELC0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Subject001" office:value-type="string">
            <text:p>Subject001</text:p>
          </table:table-cell>
          <table:table-cell calcext:value-type="string" office:string-value="1234-ff" office:value-type="string">
            <text:p>1234-ff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3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string" office:string-value="28" office:value-type="string">
            <text:p>28</text:p>
          </table:table-cell>
          <table:table-cell/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string" office:string-value="28" office:value-type="string">
            <text:p>28</text:p>
          </table:table-cell>
          <table:table-cell/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string" office:string-value="30" office:value-type="string">
            <text:p>30</text:p>
          </table:table-cell>
          <table:table-cell/>
        </table:table-row>
      </table:table>
      <table:table table:name="GroupSchedule" table:style-name="ta1">
        <table:table-column table:default-cell-style-name="ce3" table:style-name="co9"/>
        <table:table-column table:default-cell-style-name="ce3" table:number-columns-repeated="2" table:style-name="co1"/>
        <table:table-column table:default-cell-style-name="ce3" table:style-name="co10"/>
        <table:table-column table:default-cell-style-name="ce3" table:style-name="co4"/>
        <table:table-column table:default-cell-style-name="ce3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44" office:value-type="string">
            <text:p>44</text:p>
          </table:table-cell>
          <table:table-cell calcext:value-type="string" office:string-value="29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5" office:value-type="string">
            <text:p>45</text:p>
          </table:table-cell>
          <table:table-cell calcext:value-type="string" office:string-value="30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6" office:value-type="string">
            <text:p>46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7" office:value-type="string">
            <text:p>47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8" office:value-type="string">
            <text:p>48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9" office:value-type="string">
            <text:p>49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0" office:value-type="string">
            <text:p>50</text:p>
          </table:table-cell>
          <table:table-cell calcext:value-type="string" office:string-value="33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1" office:value-type="string">
            <text:p>51</text:p>
          </table:table-cell>
          <table:table-cell calcext:value-type="string" office:string-value="34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2" office:value-type="string">
            <text:p>52</text:p>
          </table:table-cell>
          <table:table-cell calcext:value-type="string" office:string-value="35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3" office:value-type="string">
            <text:p>53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4" office:value-type="string">
            <text:p>54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5" office:value-type="string">
            <text:p>55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6" office:value-type="string">
            <text:p>56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7" office:value-type="string">
            <text:p>57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8" office:value-type="string">
            <text:p>58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9" office:value-type="string">
            <text:p>59</text:p>
          </table:table-cell>
          <table:table-cell calcext:value-type="string" office:string-value="39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60" office:value-type="string">
            <text:p>60</text:p>
          </table:table-cell>
          <table:table-cell calcext:value-type="string" office:string-value="40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61" office:value-type="string">
            <text:p>61</text:p>
          </table:table-cell>
          <table:table-cell calcext:value-type="string" office:string-value="GRP40" office:value-type="string">
            <text:p>GRP40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6:00:00 AM" office:value-type="string">
            <text:p>06:00:00 AM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J-404" office:value-type="string">
            <text:p>J-404</text:p>
          </table:table-cell>
        </table:table-row>
        <table:table-row>
          <table:table-cell calcext:value-type="string" office:string-value="62" office:value-type="string">
            <text:p>62</text:p>
          </table:table-cell>
          <table:table-cell calcext:value-type="string" office:string-value="GRP40" office:value-type="string">
            <text:p>GRP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k-203" office:value-type="string">
            <text:p>k-203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2" office:value-type="string">
            <text:p>42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3" office:value-type="string">
            <text:p>43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3" table:style-name="co1"/>
        <table:table-column table:default-cell-style-name="ce3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Vw32f.j7EzZVXQNvWgGmuuGLpDEsl1yAQ2.dY7KCL0P1GVpI/Xudm" office:value-type="string">
            <text:p>$2a$10$Vw32f.j7EzZVXQNvWgGmuuGLpDEsl1yAQ2.dY7KCL0P1GVpI/Xud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427639947" office:value-type="string">
            <text:p>1427639947</text:p>
          </table:table-cell>
          <table:table-cell calcext:value-type="string" office:string-value="2000-05-15" office:value-type="string">
            <text:p>2000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dmin@gmail.com" office:value-type="string">
            <text:p>admin@gmail.com</text:p>
          </table:table-cell>
          <table:table-cell calcext:value-type="string" office:string-value="$2a$10$rQrtmZi82jQaCDXqYUJedOdYqh4mFUkwnDwscFcW6Ch0zsAkhWFT." office:value-type="string">
            <text:p>$2a$10$rQrtmZi82jQaCDXqYUJedOdYqh4mFUkwnDwscFcW6Ch0zsAkhWFT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2026-06-19T14:49:52.472652532" office:value-type="string">
            <text:p>2026-06-19T14:49:52.472652532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mando" office:value-type="string">
            <text:p>Armando</text:p>
          </table:table-cell>
          <table:table-cell calcext:value-type="string" office:string-value="Escobar" office:value-type="string">
            <text:p>Escobar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75335" office:value-type="string">
            <text:p>4675335</text:p>
          </table:table-cell>
          <table:table-cell calcext:value-type="string" office:string-value="2003-06-16" office:value-type="string">
            <text:p>2003-06-16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26383929" office:value-type="string">
            <text:p>726383929</text:p>
          </table:table-cell>
          <table:table-cell calcext:value-type="string" office:string-value="sjndkzdx" office:value-type="string">
            <text:p>sjndkzdx</text:p>
          </table:table-cell>
          <table:table-cell calcext:value-type="string" office:string-value="armando@gmail.com" office:value-type="string">
            <text:p>armando@gmail.com</text:p>
          </table:table-cell>
          <table:table-cell calcext:value-type="string" office:string-value="$2a$10$2rW9glTwiM10G6alXFzfQeHgKQihbQw0I7NQpqbKeVdQ47Jbcl2A." office:value-type="string">
            <text:p>$2a$10$2rW9glTwiM10G6alXFzfQeHgKQihbQw0I7NQpqbKeVdQ47Jbcl2A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15:23:41.095057129" office:value-type="string">
            <text:p>2026-06-26T15:23:41.095057129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ejemplo" office:value-type="string">
            <text:p>ejemplo</text:p>
          </table:table-cell>
          <table:table-cell calcext:value-type="string" office:string-value="eee" office:value-type="string">
            <text:p>eee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0298973" office:value-type="string">
            <text:p>0298973</text:p>
          </table:table-cell>
          <table:table-cell calcext:value-type="string" office:string-value="2026-06-02" office:value-type="string">
            <text:p>2026-06-02</text:p>
          </table:table-cell>
          <table:table-cell calcext:value-type="string" office:string-value="FEMALE" office:value-type="string">
            <text:p>FEMALE</text:p>
          </table:table-cell>
          <table:table-cell calcext:value-type="string" office:string-value="333333333" office:value-type="string">
            <text:p>333333333</text:p>
          </table:table-cell>
          <table:table-cell calcext:value-type="string" office:string-value="ddddddd" office:value-type="string">
            <text:p>ddddddd</text:p>
          </table:table-cell>
          <table:table-cell calcext:value-type="string" office:string-value="kkkk@gmail.com" office:value-type="string">
            <text:p>kkkk@gmail.com</text:p>
          </table:table-cell>
          <table:table-cell calcext:value-type="string" office:string-value="$2a$10$y8BLy7SJbRBjaEtnHLvpWONQ3ZzC5zhBPg43uZv.gCcaLDxCr8Ee2" office:value-type="string">
            <text:p>$2a$10$y8BLy7SJbRBjaEtnHLvpWONQ3ZzC5zhBPg43uZv.gCcaLDxCr8Ee2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15:25:24.356535393" office:value-type="string">
            <text:p>2026-06-26T15:25:24.356535393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column table:default-cell-style-name="Default" table:style-name="co12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academicProgram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7982716" office:value-type="string">
            <text:p>2798271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8669145" office:value-type="string">
            <text:p>68669145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13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2" office:value-type="string">
            <text:p>2026-06-2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3" office:value-type="string">
            <text:p>2026-06-23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4" office:value-type="string">
            <text:p>2026-06-24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6" office:value-type="string">
            <text:p>2026-06-26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ENR3" office:value-type="string">
            <text:p>ENR3</text:p>
          </table:table-cell>
          <table:table-cell calcext:value-type="string" office:string-value="STU3" office:value-type="string">
            <text:p>STU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4" office:value-type="string">
            <text:p>ENR4</text:p>
          </table:table-cell>
          <table:table-cell calcext:value-type="string" office:string-value="STU5" office:value-type="string">
            <text:p>STU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5" office:value-type="string">
            <text:p>ENR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23" office:value-type="string">
            <text:p>ED23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4" office:value-type="string">
            <text:p>ED24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5" office:value-type="string">
            <text:p>ED25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6" office:value-type="string">
            <text:p>ED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7" office:value-type="string">
            <text:p>ED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4.5" office:value-type="string">
            <text:p>4.5</text:p>
          </table:table-cell>
        </table:table-row>
        <table:table-row>
          <table:table-cell calcext:value-type="string" office:string-value="ED28" office:value-type="string">
            <text:p>ED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9" office:value-type="string">
            <text:p>ED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0" office:value-type="string">
            <text:p>ED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1" office:value-type="string">
            <text:p>ED3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2" office:value-type="string">
            <text:p>ED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3" office:value-type="string">
            <text:p>ED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4" office:value-type="string">
            <text:p>ED34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5" office:value-type="string">
            <text:p>ED35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6" office:value-type="string">
            <text:p>ED36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5" office:value-type="string">
            <text:p>ED15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7" office:value-type="string">
            <text:p>ED37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6" office:value-type="string">
            <text:p>ED16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8" office:value-type="string">
            <text:p>ED3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7" office:value-type="string">
            <text:p>ED17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9" office:value-type="string">
            <text:p>ED3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8" office:value-type="string">
            <text:p>ED18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9" office:value-type="string">
            <text:p>ED19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40" office:value-type="string">
            <text:p>ED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0" office:value-type="string">
            <text:p>ED20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1" office:value-type="string">
            <text:p>ED21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3.2" office:value-type="string">
            <text:p>3.2</text:p>
          </table:table-cell>
        </table:table-row>
        <table:table-row>
          <table:table-cell calcext:value-type="string" office:string-value="ED22" office:value-type="string">
            <text:p>ED22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2" table:style-name="co1"/>
        <table:table-column table:default-cell-style-name="Default" table:style-name="co6"/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enrollmentDetail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027-2" office:value-type="string">
            <text:p>2027-2</text:p>
          </table:table-cell>
          <table:table-cell calcext:value-type="string" office:string-value="Periodo academico del 2027-2" office:value-type="string">
            <text:p>Periodo academico del 2027-2</text:p>
          </table:table-cell>
          <table:table-cell calcext:value-type="string" office:string-value="2027-08-06" office:value-type="string">
            <text:p>2027-08-06</text:p>
          </table:table-cell>
          <table:table-cell calcext:value-type="string" office:string-value="2027-12-16" office:value-type="string">
            <text:p>2027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028-1" office:value-type="string">
            <text:p>2028-1</text:p>
          </table:table-cell>
          <table:table-cell calcext:value-type="string" office:string-value="Periodo academico para 2028-1" office:value-type="string">
            <text:p>Periodo academico para 2028-1</text:p>
          </table:table-cell>
          <table:table-cell calcext:value-type="string" office:string-value="2028-02-14" office:value-type="string">
            <text:p>2028-02-14</text:p>
          </table:table-cell>
          <table:table-cell calcext:value-type="string" office:string-value="2028-06-16" office:value-type="string">
            <text:p>2028-06-16</text:p>
          </table:table-cell>
          <table:table-cell calcext:value-type="string" office:string-value="ACTIVE" office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00:31:25.844970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24T00:33:00.057578060</dc:date>
    <meta:editing-duration>P1DT10H1M19S</meta:editing-duration>
    <meta:editing-cycles>38</meta:editing-cycles>
    <meta:document-statistic meta:table-count="16" meta:cell-count="1361" meta:object-count="0"/>
  </office:meta>
</office:document-meta>
</file>