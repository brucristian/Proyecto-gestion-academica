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0508in"/>
    </style:style>
    <style:style style:family="table-column" style:name="co13">
      <style:table-column-properties fo:break-before="auto" style:column-width="1.1575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Hola mundo" office:value-type="string">
            <text:p>Hola mundo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13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DSW401-D" office:value-type="string">
            <text:p>D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fgtOW95SMFReYkcpiUBBK.IzTYEBK1ubk3z3xvJAEqpAec3bw55Pa" office:value-type="string">
            <text:p>$2a$10$fgtOW95SMFReYkcpiUBBK.IzTYEBK1ubk3z3xvJAEqpAec3bw55Pa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6" office:value-type="string">
            <text:p>STU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2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ACTIVE" office:value-type="string">
            <text:p>ACTIVE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11:51:49.77514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13T11:52:08.145337010</dc:date>
    <meta:editing-duration>PT14H20M8S</meta:editing-duration>
    <meta:editing-cycles>31</meta:editing-cycles>
    <meta:document-statistic meta:table-count="16" meta:cell-count="1291" meta:object-count="0"/>
  </office:meta>
</office:document-meta>
</file>